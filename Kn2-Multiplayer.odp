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DA000002A6394CB748.png" manifest:media-type="image/png"/>
  <manifest:file-entry manifest:full-path="Pictures/10000001000001BF0000017A73C08232.png" manifest:media-type="image/png"/>
  <manifest:file-entry manifest:full-path="Pictures/10000001000007D0000003083AEBB544.png" manifest:media-type="image/png"/>
  <manifest:file-entry manifest:full-path="Pictures/1000000000000780000004383B257F6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ヒラギノ角ゴ Pro W3" svg:font-family="'ヒラギノ角ゴ Pro W3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6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8cm" fo:min-width="2.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374cm" fo:min-width="3.5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3cm" fo:min-width="2.5cm" loext:decorative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7.5cm" loext:decorative="false"/>
    </style:style>
    <style:style style:name="pr1" style:family="presentation" style:parent-style-name="Titelfolie-outline1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-outline1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Ein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Ein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Ein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Ein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Kapitaltrenner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Kapitaltrenn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Ein_20_Inhalt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Ein_20_Inhal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Ein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Ein_20_Inhalt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Ein_20_Inhal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Ein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Ein_20_Inhalt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Ein_20_Inhal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Ein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Abschlussfolie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Literaturverzeichni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iteraturverzeichnis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iteraturverzeichnis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4c93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>
        <loext:char-complex-color loext:theme-type="dark2" loext:color-type="theme"/>
      </style:text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4c93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247cm" fo:margin-bottom="0.247cm" fo:line-height="100%" fo:text-align="start" fo:text-indent="0cm" style:punctuation-wrap="hanging" loext:tab-stop-distance="1.27cm" style:writing-mode="lr-tb">
        <style:tab-stops/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name-asian="ヒラギノ角ゴ Pro W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variant="normal" fo:text-transform="none" fo:color="#0e121b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name-asian="ヒラギノ角ゴ Pro W3" style:font-size-asian="24pt" style:font-style-asian="normal" style:font-weight-asian="bold" style:font-name-complex="Arial" style:font-size-complex="24pt" style:font-style-complex="normal" style:font-weight-complex="bold">
        <loext:char-complex-color loext:theme-type="accent6" loext:color-type="theme">
          <loext:transformation loext:type="lummod" loext:value="1000"/>
        </loext:char-complex-color>
      </style:text-properties>
    </style:style>
    <style:style style:name="P13" style:family="paragraph">
      <loext:graphic-properties draw:fill="none"/>
      <style:paragraph-properties fo:margin-left="0cm" fo:margin-right="0cm" fo:margin-top="0.247cm" fo:margin-bottom="0.247cm" fo:line-height="100%" fo:text-align="start" fo:text-indent="0cm" style:punctuation-wrap="hanging" loext:tab-stop-distance="1.27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ヒラギノ角ゴ Pro W3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.247cm" fo:margin-bottom="0.141cm" fo:line-height="100%" fo:text-align="start" fo:text-indent="0cm" style:punctuation-wrap="hanging" loext:tab-stop-distance="1.27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ヒラギノ角ゴ Pro W3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font-variant="normal" fo:text-transform="none" fo:color="#0e121b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name-asian="ヒラギノ角ゴ Pro W3" style:font-size-asian="24pt" style:font-style-asian="normal" style:font-weight-asian="bold" style:font-name-complex="Arial" style:font-size-complex="24pt" style:font-style-complex="normal" style:font-weight-complex="bold">
        <loext:char-complex-color loext:theme-type="accent6" loext:color-type="theme">
          <loext:transformation loext:type="lummod" loext:value="1000"/>
        </loext:char-complex-color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ヒラギノ角ゴ Pro W3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4c93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e12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4c9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9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Textplatzhalter 5" presentation:style-name="pr1" draw:text-style-name="P1" draw:layer="layout" svg:width="25.196cm" svg:height="4.455cm" svg:x="1.466cm" svg:y="12.032cm" presentation:class="outline" presentation:placeholder="true" presentation:user-transformed="true">
          <draw:text-box/>
        </draw:frame>
        <draw:frame draw:name="Textplatzhalter 1" presentation:style-name="pr2" draw:text-style-name="P2" draw:layer="layout" svg:width="25.196cm" svg:height="0.948cm" svg:x="1.466cm" svg:y="17.32cm" presentation:class="outline" presentation:placeholder="true" presentation:user-transformed="true">
          <draw:text-box/>
        </draw:frame>
        <draw:custom-shape draw:style-name="gr1" draw:text-style-name="P3" draw:layer="layout" svg:width="6.5cm" svg:height="4cm" svg:x="2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Ein_20_Inhalt">
        <draw:frame draw:name="Titel 4" presentation:style-name="pr4" draw:text-style-name="P6" draw:layer="layout" svg:width="27.671cm" svg:height="2.323cm" svg:x="0.631cm" svg:y="0.498cm" presentation:class="title" presentation:user-transformed="true">
          <draw:text-box>
            <text:p text:style-name="P5"><text:span text:style-name="T1">Gliederung</text:span></text:p>
          </draw:text-box>
        </draw:frame>
        <draw:frame draw:name="Inhaltsplatzhalter 5" presentation:style-name="pr5" draw:text-style-name="P8" draw:layer="layout" svg:width="32.604cm" svg:height="14cm" svg:x="0.631cm" svg:y="3.426cm" presentation:class="outline" presentation:user-transformed="true">
          <draw:text-box>
            <text:list text:style-name="L3">
              <text:list-item>
                <text:p text:style-name="P7"><text:span text:style-name="T2">Einleitung</text:span></text:p>
              </text:list-item>
              <text:list-item>
                <text:p text:style-name="P7"><text:span text:style-name="T2">&lt;Hauptteil&gt;</text:span></text:p>
              </text:list-item>
              <text:list-item>
                <text:p text:style-name="P7"><text:span text:style-name="T2">Zusammenfassung</text:span></text:p>
              </text:list-item>
            </text:list>
          </draw:text-box>
        </draw:frame>
        <draw:frame draw:name="Textplatzhalter 3" presentation:style-name="pr6" draw:text-style-name="P9" draw:layer="layout" svg:width="7.041cm" svg:height="1.101cm" svg:x="3.391cm" svg:y="17.524cm" presentation:class="outline" presentation:placeholder="true" presentation:user-transformed="true">
          <draw:text-box/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apitaltrenner">
        <draw:frame draw:name="Textplatzhalter 6" presentation:style-name="pr8" draw:text-style-name="P11" draw:layer="layout" svg:width="25.196cm" svg:height="2.754cm" svg:x="1.466cm" svg:y="12.032cm" presentation:class="outline" presentation:user-transformed="true">
          <draw:text-box>
            <text:p text:style-name="P10"><text:span text:style-name="T3">&lt;Einleitung&gt;</text:span></text:p>
          </draw:text-box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in_20_Inhalt">
        <draw:frame draw:name="Titel 1" presentation:style-name="pr10" draw:text-style-name="P12" draw:layer="layout" svg:width="27.671cm" svg:height="2.323cm" svg:x="0.631cm" svg:y="0.498cm" presentation:class="title" presentation:placeholder="true" presentation:user-transformed="true">
          <draw:text-box/>
        </draw:frame>
        <draw:frame draw:name="Inhaltsplatzhalter 5" presentation:style-name="pr11" draw:text-style-name="P13" draw:layer="layout" svg:width="32.604cm" svg:height="14cm" svg:x="0.631cm" svg:y="3.426cm" presentation:class="outline" presentation:placeholder="true" presentation:user-transformed="true">
          <draw:text-box/>
        </draw:frame>
        <draw:frame draw:name="Textplatzhalter 6" presentation:style-name="pr12" draw:text-style-name="P9" draw:layer="layout" svg:width="7.041cm" svg:height="1.101cm" svg:x="3.391cm" svg:y="17.524cm" presentation:class="outline" presentation:placeholder="true" presentation:user-transformed="true">
          <draw:text-box/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apitaltrenner">
        <draw:frame draw:name="Textplatzhalter 6" presentation:style-name="pr8" draw:text-style-name="P11" draw:layer="layout" svg:width="25.196cm" svg:height="2.754cm" svg:x="1.466cm" svg:y="12.032cm" presentation:class="outline" presentation:user-transformed="true">
          <draw:text-box>
            <text:p text:style-name="P10"><text:span text:style-name="T3">&lt;Hauptteil&gt;</text:span></text:p>
          </draw:text-box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in_20_Inhalt">
        <draw:frame draw:name="Titel 5" presentation:style-name="pr13" draw:text-style-name="P12" draw:layer="layout" svg:width="27.671cm" svg:height="2.323cm" svg:x="0.631cm" svg:y="0.498cm" presentation:class="title" presentation:placeholder="true" presentation:user-transformed="true">
          <draw:text-box/>
        </draw:frame>
        <draw:frame draw:name="Inhaltsplatzhalter 6" presentation:style-name="pr14" draw:text-style-name="P13" draw:layer="layout" svg:width="32.604cm" svg:height="14cm" svg:x="0.631cm" svg:y="3.426cm" presentation:class="outline" presentation:placeholder="true" presentation:user-transformed="true">
          <draw:text-box/>
        </draw:frame>
        <draw:frame draw:name="Textplatzhalter 7" presentation:style-name="pr15" draw:text-style-name="P9" draw:layer="layout" svg:width="7.041cm" svg:height="1.101cm" svg:x="3.391cm" svg:y="17.524cm" presentation:class="outline" presentation:placeholder="true" presentation:user-transformed="true">
          <draw:text-box/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apitaltrenner">
        <draw:frame draw:name="Textplatzhalter 1" presentation:style-name="pr8" draw:text-style-name="P11" draw:layer="layout" svg:width="25.196cm" svg:height="2.754cm" svg:x="1.466cm" svg:y="12.032cm" presentation:class="outline" presentation:user-transformed="true">
          <draw:text-box>
            <text:p text:style-name="P10"><text:span text:style-name="T3">Zusammenfassung</text:span></text:p>
          </draw:text-box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in_20_Inhalt">
        <draw:frame draw:name="Titel 9" presentation:style-name="pr16" draw:text-style-name="P12" draw:layer="layout" svg:width="27.671cm" svg:height="2.323cm" svg:x="0.631cm" svg:y="0.498cm" presentation:class="title" presentation:placeholder="true" presentation:user-transformed="true">
          <draw:text-box/>
        </draw:frame>
        <draw:frame draw:name="Inhaltsplatzhalter 10" presentation:style-name="pr17" draw:text-style-name="P13" draw:layer="layout" svg:width="32.604cm" svg:height="14cm" svg:x="0.631cm" svg:y="3.426cm" presentation:class="outline" presentation:placeholder="true" presentation:user-transformed="true">
          <draw:text-box/>
        </draw:frame>
        <draw:frame draw:name="Textplatzhalter 11" presentation:style-name="pr18" draw:text-style-name="P9" draw:layer="layout" svg:width="7.041cm" svg:height="1.101cm" svg:x="3.391cm" svg:y="17.524cm" presentation:class="outline" presentation:placeholder="true" presentation:user-transformed="true">
          <draw:text-box/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chlussfolie">
        <draw:custom-shape draw:style-name="gr5" draw:text-style-name="P3" draw:layer="layout" svg:width="3cm" svg:height="2.55cm" svg:x="29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8cm" svg:height="4cm" svg:x="1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teratur" draw:style-name="dp1" draw:master-page-name="Literaturverzeichnis">
        <draw:frame draw:name="Titel 1" presentation:style-name="pr20" draw:text-style-name="P6" draw:layer="layout" svg:width="27.671cm" svg:height="2.323cm" svg:x="0.631cm" svg:y="0.498cm" presentation:class="title" presentation:user-transformed="true">
          <draw:text-box>
            <text:p text:style-name="P5"><text:span text:style-name="T1">Literatur</text:span></text:p>
          </draw:text-box>
        </draw:frame>
        <draw:frame draw:name="Textplatzhalter 2" presentation:style-name="pr21" draw:text-style-name="P14" draw:layer="layout" svg:width="32.604cm" svg:height="14cm" svg:x="0.631cm" svg:y="3.426cm" presentation:class="outline" presentation:placeholder="true" presentation:user-transformed="true">
          <draw:text-box/>
        </draw:frame>
        <draw:custom-shape draw:style-name="gr3" draw:text-style-name="P3" draw:layer="layout" svg:width="3cm" svg:height="2.05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1.624cm" svg:x="29.867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ヒラギノ角ゴ Pro W3" svg:font-family="'ヒラギノ角ゴ Pro W3'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Untertitel-background" style:display-name="Titelfolie mit Untertitel-background" style:family="presentation">
      <style:graphic-properties draw:stroke="none" draw:fill="solid" draw:fill-color="#ffffff"/>
      <style:text-properties style:letter-kerning="true"/>
    </style:style>
    <style:style style:name="Titelfolie_20_mit_20_Untertitel-backgroundobjects" style:display-name="Titelfolie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Untertitel-notes" style:display-name="Titelfolie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Untertitel-outline1" style:display-name="Titelfolie mit Untertitel-outline1" style:family="presentation">
      <style:graphic-properties draw:stroke="none" draw:fill="none" draw:auto-grow-height="false" draw:fit-to-size="false" style:shrink-to-fit="true" style:writing-mode="lr-tb">
        <text:list-style style:name="Titelfolie_20_mit_20_Untertitel-outline1" style:display-name="Titelfolie mit Unter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Untertitel-outline2" style:display-name="Titelfolie mit Untertitel-outline2" style:family="presentation" style:parent-style-name="Titelfolie_20_mit_20_Unter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Untertitel-outline3" style:display-name="Titelfolie mit Untertitel-outline3" style:family="presentation" style:parent-style-name="Titelfolie_20_mit_20_Unter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Untertitel-outline4" style:display-name="Titelfolie mit Untertitel-outline4" style:family="presentation" style:parent-style-name="Titelfolie_20_mit_20_Unter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Untertitel-outline5" style:display-name="Titelfolie mit Untertitel-outline5" style:family="presentation" style:parent-style-name="Titelfolie_20_mit_20_Untertitel-outline4">
      <style:paragraph-properties fo:margin-top="0.1cm" fo:margin-bottom="0cm"/>
      <style:text-properties fo:font-size="20pt" style:font-size-asian="20pt" style:font-size-complex="20pt"/>
    </style:style>
    <style:style style:name="Titelfolie_20_mit_20_Untertitel-outline6" style:display-name="Titelfolie mit Untertitel-outline6" style:family="presentation" style:parent-style-name="Titelfolie_20_mit_20_Untertitel-outline5">
      <style:paragraph-properties fo:margin-top="0.1cm" fo:margin-bottom="0cm"/>
      <style:text-properties fo:font-size="20pt" style:font-size-asian="20pt" style:font-size-complex="20pt"/>
    </style:style>
    <style:style style:name="Titelfolie_20_mit_20_Untertitel-outline7" style:display-name="Titelfolie mit Untertitel-outline7" style:family="presentation" style:parent-style-name="Titelfolie_20_mit_20_Untertitel-outline6">
      <style:paragraph-properties fo:margin-top="0.1cm" fo:margin-bottom="0cm"/>
      <style:text-properties fo:font-size="20pt" style:font-size-asian="20pt" style:font-size-complex="20pt"/>
    </style:style>
    <style:style style:name="Titelfolie_20_mit_20_Untertitel-outline8" style:display-name="Titelfolie mit Untertitel-outline8" style:family="presentation" style:parent-style-name="Titelfolie_20_mit_20_Untertitel-outline7">
      <style:paragraph-properties fo:margin-top="0.1cm" fo:margin-bottom="0cm"/>
      <style:text-properties fo:font-size="20pt" style:font-size-asian="20pt" style:font-size-complex="20pt"/>
    </style:style>
    <style:style style:name="Titelfolie_20_mit_20_Untertitel-outline9" style:display-name="Titelfolie mit Untertitel-outline9" style:family="presentation" style:parent-style-name="Titelfolie_20_mit_20_Untertitel-outline8">
      <style:paragraph-properties fo:margin-top="0.1cm" fo:margin-bottom="0cm"/>
      <style:text-properties fo:font-size="20pt" style:font-size-asian="20pt" style:font-size-complex="20pt"/>
    </style:style>
    <style:style style:name="Titelfolie_20_mit_20_Untertitel-subtitle" style:display-name="Titelfolie mit Untertitel-subtitle" style:family="presentation">
      <style:graphic-properties draw:stroke="none" draw:fill="none" draw:textarea-vertical-align="middle">
        <text:list-style style:name="Titelfolie_20_mit_20_Untertitel-subtitle" style:display-name="Titelfolie mit Unter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Untertitel-title" style:display-name="Titelfolie mit Untertitel-title" style:family="presentation">
      <style:graphic-properties draw:stroke="none" draw:fill="none" draw:textarea-vertical-align="middle" style:writing-mode="lr-tb">
        <text:list-style style:name="Titelfolie_20_mit_20_Untertitel-title" style:display-name="Titelfolie mit Unter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törer-background" style:display-name="Titelfolie mit Störer-background" style:family="presentation">
      <style:graphic-properties draw:stroke="none" draw:fill="solid" draw:fill-color="#ffffff"/>
      <style:text-properties style:letter-kerning="true"/>
    </style:style>
    <style:style style:name="Titelfolie_20_mit_20_Störer-backgroundobjects" style:display-name="Titelfolie mit Stör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törer-notes" style:display-name="Titelfolie mit Stör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törer-outline1" style:display-name="Titelfolie mit Störer-outline1" style:family="presentation">
      <style:graphic-properties draw:stroke="none" draw:fill="none" draw:auto-grow-height="false" draw:fit-to-size="false" style:shrink-to-fit="true" style:writing-mode="lr-tb">
        <text:list-style style:name="Titelfolie_20_mit_20_Störer-outline1" style:display-name="Titelfolie mit Stör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törer-outline2" style:display-name="Titelfolie mit Störer-outline2" style:family="presentation" style:parent-style-name="Titelfolie_20_mit_20_Stör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törer-outline3" style:display-name="Titelfolie mit Störer-outline3" style:family="presentation" style:parent-style-name="Titelfolie_20_mit_20_Stör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törer-outline4" style:display-name="Titelfolie mit Störer-outline4" style:family="presentation" style:parent-style-name="Titelfolie_20_mit_20_Stör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törer-outline5" style:display-name="Titelfolie mit Störer-outline5" style:family="presentation" style:parent-style-name="Titelfolie_20_mit_20_Störer-outline4">
      <style:paragraph-properties fo:margin-top="0.1cm" fo:margin-bottom="0cm"/>
      <style:text-properties fo:font-size="20pt" style:font-size-asian="20pt" style:font-size-complex="20pt"/>
    </style:style>
    <style:style style:name="Titelfolie_20_mit_20_Störer-outline6" style:display-name="Titelfolie mit Störer-outline6" style:family="presentation" style:parent-style-name="Titelfolie_20_mit_20_Störer-outline5">
      <style:paragraph-properties fo:margin-top="0.1cm" fo:margin-bottom="0cm"/>
      <style:text-properties fo:font-size="20pt" style:font-size-asian="20pt" style:font-size-complex="20pt"/>
    </style:style>
    <style:style style:name="Titelfolie_20_mit_20_Störer-outline7" style:display-name="Titelfolie mit Störer-outline7" style:family="presentation" style:parent-style-name="Titelfolie_20_mit_20_Störer-outline6">
      <style:paragraph-properties fo:margin-top="0.1cm" fo:margin-bottom="0cm"/>
      <style:text-properties fo:font-size="20pt" style:font-size-asian="20pt" style:font-size-complex="20pt"/>
    </style:style>
    <style:style style:name="Titelfolie_20_mit_20_Störer-outline8" style:display-name="Titelfolie mit Störer-outline8" style:family="presentation" style:parent-style-name="Titelfolie_20_mit_20_Störer-outline7">
      <style:paragraph-properties fo:margin-top="0.1cm" fo:margin-bottom="0cm"/>
      <style:text-properties fo:font-size="20pt" style:font-size-asian="20pt" style:font-size-complex="20pt"/>
    </style:style>
    <style:style style:name="Titelfolie_20_mit_20_Störer-outline9" style:display-name="Titelfolie mit Störer-outline9" style:family="presentation" style:parent-style-name="Titelfolie_20_mit_20_Störer-outline8">
      <style:paragraph-properties fo:margin-top="0.1cm" fo:margin-bottom="0cm"/>
      <style:text-properties fo:font-size="20pt" style:font-size-asian="20pt" style:font-size-complex="20pt"/>
    </style:style>
    <style:style style:name="Titelfolie_20_mit_20_Störer-subtitle" style:display-name="Titelfolie mit Störer-subtitle" style:family="presentation">
      <style:graphic-properties draw:stroke="none" draw:fill="none" draw:textarea-vertical-align="middle">
        <text:list-style style:name="Titelfolie_20_mit_20_Störer-subtitle" style:display-name="Titelfolie mit Stör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törer-title" style:display-name="Titelfolie mit Störer-title" style:family="presentation">
      <style:graphic-properties draw:stroke="none" draw:fill="none" draw:textarea-vertical-align="middle" style:writing-mode="lr-tb">
        <text:list-style style:name="Titelfolie_20_mit_20_Störer-title" style:display-name="Titelfolie mit Stör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Untertitel_20_und_20_Störer-background" style:display-name="Titelfolie mit Untertitel und Störer-background" style:family="presentation">
      <style:graphic-properties draw:stroke="none" draw:fill="solid" draw:fill-color="#ffffff"/>
      <style:text-properties style:letter-kerning="true"/>
    </style:style>
    <style:style style:name="Titelfolie_20_mit_20_Untertitel_20_und_20_Störer-backgroundobjects" style:display-name="Titelfolie mit Untertitel und Stör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Untertitel_20_und_20_Störer-notes" style:display-name="Titelfolie mit Untertitel und Stör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Untertitel_20_und_20_Störer-outline1" style:display-name="Titelfolie mit Untertitel und Störer-outline1" style:family="presentation">
      <style:graphic-properties draw:stroke="none" draw:fill="none" draw:auto-grow-height="false" draw:fit-to-size="false" style:shrink-to-fit="true" style:writing-mode="lr-tb">
        <text:list-style style:name="Titelfolie_20_mit_20_Untertitel_20_und_20_Störer-outline1" style:display-name="Titelfolie mit Untertitel und Stör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Untertitel_20_und_20_Störer-outline2" style:display-name="Titelfolie mit Untertitel und Störer-outline2" style:family="presentation" style:parent-style-name="Titelfolie_20_mit_20_Untertitel_20_und_20_Stör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Untertitel_20_und_20_Störer-outline3" style:display-name="Titelfolie mit Untertitel und Störer-outline3" style:family="presentation" style:parent-style-name="Titelfolie_20_mit_20_Untertitel_20_und_20_Stör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Untertitel_20_und_20_Störer-outline4" style:display-name="Titelfolie mit Untertitel und Störer-outline4" style:family="presentation" style:parent-style-name="Titelfolie_20_mit_20_Untertitel_20_und_20_Stör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Untertitel_20_und_20_Störer-outline5" style:display-name="Titelfolie mit Untertitel und Störer-outline5" style:family="presentation" style:parent-style-name="Titelfolie_20_mit_20_Untertitel_20_und_20_Störer-outline4">
      <style:paragraph-properties fo:margin-top="0.1cm" fo:margin-bottom="0cm"/>
      <style:text-properties fo:font-size="20pt" style:font-size-asian="20pt" style:font-size-complex="20pt"/>
    </style:style>
    <style:style style:name="Titelfolie_20_mit_20_Untertitel_20_und_20_Störer-outline6" style:display-name="Titelfolie mit Untertitel und Störer-outline6" style:family="presentation" style:parent-style-name="Titelfolie_20_mit_20_Untertitel_20_und_20_Störer-outline5">
      <style:paragraph-properties fo:margin-top="0.1cm" fo:margin-bottom="0cm"/>
      <style:text-properties fo:font-size="20pt" style:font-size-asian="20pt" style:font-size-complex="20pt"/>
    </style:style>
    <style:style style:name="Titelfolie_20_mit_20_Untertitel_20_und_20_Störer-outline7" style:display-name="Titelfolie mit Untertitel und Störer-outline7" style:family="presentation" style:parent-style-name="Titelfolie_20_mit_20_Untertitel_20_und_20_Störer-outline6">
      <style:paragraph-properties fo:margin-top="0.1cm" fo:margin-bottom="0cm"/>
      <style:text-properties fo:font-size="20pt" style:font-size-asian="20pt" style:font-size-complex="20pt"/>
    </style:style>
    <style:style style:name="Titelfolie_20_mit_20_Untertitel_20_und_20_Störer-outline8" style:display-name="Titelfolie mit Untertitel und Störer-outline8" style:family="presentation" style:parent-style-name="Titelfolie_20_mit_20_Untertitel_20_und_20_Störer-outline7">
      <style:paragraph-properties fo:margin-top="0.1cm" fo:margin-bottom="0cm"/>
      <style:text-properties fo:font-size="20pt" style:font-size-asian="20pt" style:font-size-complex="20pt"/>
    </style:style>
    <style:style style:name="Titelfolie_20_mit_20_Untertitel_20_und_20_Störer-outline9" style:display-name="Titelfolie mit Untertitel und Störer-outline9" style:family="presentation" style:parent-style-name="Titelfolie_20_mit_20_Untertitel_20_und_20_Störer-outline8">
      <style:paragraph-properties fo:margin-top="0.1cm" fo:margin-bottom="0cm"/>
      <style:text-properties fo:font-size="20pt" style:font-size-asian="20pt" style:font-size-complex="20pt"/>
    </style:style>
    <style:style style:name="Titelfolie_20_mit_20_Untertitel_20_und_20_Störer-subtitle" style:display-name="Titelfolie mit Untertitel und Störer-subtitle" style:family="presentation">
      <style:graphic-properties draw:stroke="none" draw:fill="none" draw:textarea-vertical-align="middle">
        <text:list-style style:name="Titelfolie_20_mit_20_Untertitel_20_und_20_Störer-subtitle" style:display-name="Titelfolie mit Untertitel und Stör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Untertitel_20_und_20_Störer-title" style:display-name="Titelfolie mit Untertitel und Störer-title" style:family="presentation">
      <style:graphic-properties draw:stroke="none" draw:fill="none" draw:textarea-vertical-align="middle" style:writing-mode="lr-tb">
        <text:list-style style:name="Titelfolie_20_mit_20_Untertitel_20_und_20_Störer-title" style:display-name="Titelfolie mit Untertitel und Stör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altrenner-background" style:family="presentation">
      <style:graphic-properties draw:stroke="none" draw:fill="solid" draw:fill-color="#ffffff"/>
      <style:text-properties style:letter-kerning="true"/>
    </style:style>
    <style:style style:name="Kapitaltren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altrenn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altrenner-outline1" style:family="presentation">
      <style:graphic-properties draw:stroke="none" draw:fill="none" draw:auto-grow-height="false" draw:fit-to-size="false" style:shrink-to-fit="true" style:writing-mode="lr-tb">
        <text:list-style style:name="Kapitaltrenn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altrenner-outline2" style:family="presentation" style:parent-style-name="Kapitaltrenn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Kapitaltrenner-outline3" style:family="presentation" style:parent-style-name="Kapitaltrenn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apitaltrenner-outline4" style:family="presentation" style:parent-style-name="Kapitaltrenn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apitaltrenner-outline5" style:family="presentation" style:parent-style-name="Kapitaltrenner-outline4">
      <style:paragraph-properties fo:margin-top="0.1cm" fo:margin-bottom="0cm"/>
      <style:text-properties fo:font-size="20pt" style:font-size-asian="20pt" style:font-size-complex="20pt"/>
    </style:style>
    <style:style style:name="Kapitaltrenner-outline6" style:family="presentation" style:parent-style-name="Kapitaltrenner-outline5">
      <style:paragraph-properties fo:margin-top="0.1cm" fo:margin-bottom="0cm"/>
      <style:text-properties fo:font-size="20pt" style:font-size-asian="20pt" style:font-size-complex="20pt"/>
    </style:style>
    <style:style style:name="Kapitaltrenner-outline7" style:family="presentation" style:parent-style-name="Kapitaltrenner-outline6">
      <style:paragraph-properties fo:margin-top="0.1cm" fo:margin-bottom="0cm"/>
      <style:text-properties fo:font-size="20pt" style:font-size-asian="20pt" style:font-size-complex="20pt"/>
    </style:style>
    <style:style style:name="Kapitaltrenner-outline8" style:family="presentation" style:parent-style-name="Kapitaltrenner-outline7">
      <style:paragraph-properties fo:margin-top="0.1cm" fo:margin-bottom="0cm"/>
      <style:text-properties fo:font-size="20pt" style:font-size-asian="20pt" style:font-size-complex="20pt"/>
    </style:style>
    <style:style style:name="Kapitaltrenner-outline9" style:family="presentation" style:parent-style-name="Kapitaltrenner-outline8">
      <style:paragraph-properties fo:margin-top="0.1cm" fo:margin-bottom="0cm"/>
      <style:text-properties fo:font-size="20pt" style:font-size-asian="20pt" style:font-size-complex="20pt"/>
    </style:style>
    <style:style style:name="Kapitaltrenner-subtitle" style:family="presentation">
      <style:graphic-properties draw:stroke="none" draw:fill="none" draw:textarea-vertical-align="middle">
        <text:list-style style:name="Kapitaltrenn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altrenner-title" style:family="presentation">
      <style:graphic-properties draw:stroke="none" draw:fill="none" draw:textarea-vertical-align="middle" style:writing-mode="lr-tb">
        <text:list-style style:name="Kapitaltrenn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altrenner_20_mit_20_Unterkapitel-background" style:display-name="Kapitaltrenner mit Unterkapitel-background" style:family="presentation">
      <style:graphic-properties draw:stroke="none" draw:fill="solid" draw:fill-color="#ffffff"/>
      <style:text-properties style:letter-kerning="true"/>
    </style:style>
    <style:style style:name="Kapitaltrenner_20_mit_20_Unterkapitel-backgroundobjects" style:display-name="Kapitaltrenner mit Unterkap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altrenner_20_mit_20_Unterkapitel-notes" style:display-name="Kapitaltrenner mit Unterkap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altrenner_20_mit_20_Unterkapitel-outline1" style:display-name="Kapitaltrenner mit Unterkapitel-outline1" style:family="presentation">
      <style:graphic-properties draw:stroke="none" draw:fill="none" draw:auto-grow-height="false" draw:fit-to-size="false" style:shrink-to-fit="true" style:writing-mode="lr-tb">
        <text:list-style style:name="Kapitaltrenner_20_mit_20_Unterkapitel-outline1" style:display-name="Kapitaltrenner mit Unterkap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altrenner_20_mit_20_Unterkapitel-outline2" style:display-name="Kapitaltrenner mit Unterkapitel-outline2" style:family="presentation" style:parent-style-name="Kapitaltrenner_20_mit_20_Unterkap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Kapitaltrenner_20_mit_20_Unterkapitel-outline3" style:display-name="Kapitaltrenner mit Unterkapitel-outline3" style:family="presentation" style:parent-style-name="Kapitaltrenner_20_mit_20_Unterkap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apitaltrenner_20_mit_20_Unterkapitel-outline4" style:display-name="Kapitaltrenner mit Unterkapitel-outline4" style:family="presentation" style:parent-style-name="Kapitaltrenner_20_mit_20_Unterkap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apitaltrenner_20_mit_20_Unterkapitel-outline5" style:display-name="Kapitaltrenner mit Unterkapitel-outline5" style:family="presentation" style:parent-style-name="Kapitaltrenner_20_mit_20_Unterkapitel-outline4">
      <style:paragraph-properties fo:margin-top="0.1cm" fo:margin-bottom="0cm"/>
      <style:text-properties fo:font-size="20pt" style:font-size-asian="20pt" style:font-size-complex="20pt"/>
    </style:style>
    <style:style style:name="Kapitaltrenner_20_mit_20_Unterkapitel-outline6" style:display-name="Kapitaltrenner mit Unterkapitel-outline6" style:family="presentation" style:parent-style-name="Kapitaltrenner_20_mit_20_Unterkapitel-outline5">
      <style:paragraph-properties fo:margin-top="0.1cm" fo:margin-bottom="0cm"/>
      <style:text-properties fo:font-size="20pt" style:font-size-asian="20pt" style:font-size-complex="20pt"/>
    </style:style>
    <style:style style:name="Kapitaltrenner_20_mit_20_Unterkapitel-outline7" style:display-name="Kapitaltrenner mit Unterkapitel-outline7" style:family="presentation" style:parent-style-name="Kapitaltrenner_20_mit_20_Unterkapitel-outline6">
      <style:paragraph-properties fo:margin-top="0.1cm" fo:margin-bottom="0cm"/>
      <style:text-properties fo:font-size="20pt" style:font-size-asian="20pt" style:font-size-complex="20pt"/>
    </style:style>
    <style:style style:name="Kapitaltrenner_20_mit_20_Unterkapitel-outline8" style:display-name="Kapitaltrenner mit Unterkapitel-outline8" style:family="presentation" style:parent-style-name="Kapitaltrenner_20_mit_20_Unterkapitel-outline7">
      <style:paragraph-properties fo:margin-top="0.1cm" fo:margin-bottom="0cm"/>
      <style:text-properties fo:font-size="20pt" style:font-size-asian="20pt" style:font-size-complex="20pt"/>
    </style:style>
    <style:style style:name="Kapitaltrenner_20_mit_20_Unterkapitel-outline9" style:display-name="Kapitaltrenner mit Unterkapitel-outline9" style:family="presentation" style:parent-style-name="Kapitaltrenner_20_mit_20_Unterkapitel-outline8">
      <style:paragraph-properties fo:margin-top="0.1cm" fo:margin-bottom="0cm"/>
      <style:text-properties fo:font-size="20pt" style:font-size-asian="20pt" style:font-size-complex="20pt"/>
    </style:style>
    <style:style style:name="Kapitaltrenner_20_mit_20_Unterkapitel-subtitle" style:display-name="Kapitaltrenner mit Unterkapitel-subtitle" style:family="presentation">
      <style:graphic-properties draw:stroke="none" draw:fill="none" draw:textarea-vertical-align="middle">
        <text:list-style style:name="Kapitaltrenner_20_mit_20_Unterkapitel-subtitle" style:display-name="Kapitaltrenner mit Unterkap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altrenner_20_mit_20_Unterkapitel-title" style:display-name="Kapitaltrenner mit Unterkapitel-title" style:family="presentation">
      <style:graphic-properties draw:stroke="none" draw:fill="none" draw:textarea-vertical-align="middle" style:writing-mode="lr-tb">
        <text:list-style style:name="Kapitaltrenner_20_mit_20_Unterkapitel-title" style:display-name="Kapitaltrenner mit Unterkap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lussfolie-background" style:family="presentation">
      <style:graphic-properties draw:stroke="none" draw:fill="solid" draw:fill-color="#ffffff"/>
      <style:text-properties style:letter-kerning="true"/>
    </style:style>
    <style:style style:name="Ab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folie-outline1" style:family="presentation">
      <style:graphic-properties draw:stroke="none" draw:fill="none" draw:auto-grow-height="false" draw:fit-to-size="false" style:shrink-to-fit="true" style:writing-mode="lr-tb">
        <text:list-style style:name="Ab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8pt" style:font-style-asian="normal" style:font-weight-asian="normal" style:font-name-complex="ヒラギノ角ゴ Pro W3" style:font-family-complex="'ヒラギノ角ゴ Pro W3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lussfolie-outline2" style:family="presentation" style:parent-style-name="Abschluss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Abschlussfolie-outline3" style:family="presentation" style:parent-style-name="Abschluss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lussfolie-outline4" style:family="presentation" style:parent-style-name="Abschluss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lussfolie-outline5" style:family="presentation" style:parent-style-name="Abschlussfolie-outline4">
      <style:paragraph-properties fo:margin-top="0.1cm" fo:margin-bottom="0cm"/>
      <style:text-properties fo:font-size="20pt" style:font-size-asian="20pt" style:font-size-complex="20pt"/>
    </style:style>
    <style:style style:name="Abschlussfolie-outline6" style:family="presentation" style:parent-style-name="Abschlussfolie-outline5">
      <style:paragraph-properties fo:margin-top="0.1cm" fo:margin-bottom="0cm"/>
      <style:text-properties fo:font-size="20pt" style:font-size-asian="20pt" style:font-size-complex="20pt"/>
    </style:style>
    <style:style style:name="Abschlussfolie-outline7" style:family="presentation" style:parent-style-name="Abschlussfolie-outline6">
      <style:paragraph-properties fo:margin-top="0.1cm" fo:margin-bottom="0cm"/>
      <style:text-properties fo:font-size="20pt" style:font-size-asian="20pt" style:font-size-complex="20pt"/>
    </style:style>
    <style:style style:name="Abschlussfolie-outline8" style:family="presentation" style:parent-style-name="Abschlussfolie-outline7">
      <style:paragraph-properties fo:margin-top="0.1cm" fo:margin-bottom="0cm"/>
      <style:text-properties fo:font-size="20pt" style:font-size-asian="20pt" style:font-size-complex="20pt"/>
    </style:style>
    <style:style style:name="Abschlussfolie-outline9" style:family="presentation" style:parent-style-name="Abschlussfolie-outline8">
      <style:paragraph-properties fo:margin-top="0.1cm" fo:margin-bottom="0cm"/>
      <style:text-properties fo:font-size="20pt" style:font-size-asian="20pt" style:font-size-complex="20pt"/>
    </style:style>
    <style:style style:name="Abschlussfolie-subtitle" style:family="presentation">
      <style:graphic-properties draw:stroke="none" draw:fill="none" draw:textarea-vertical-align="middle">
        <text:list-style style:name="Ab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folie-title" style:family="presentation">
      <style:graphic-properties draw:stroke="none" draw:fill="none" draw:textarea-vertical-align="middle" style:writing-mode="lr-tb">
        <text:list-style style:name="Ab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font-style-asian="normal" style:font-weight-asian="normal" style:font-name-complex="ヒラギノ角ゴ Pro W3" style:font-family-complex="'ヒラギノ角ゴ Pro W3'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in_20_Inhalt-background" style:display-name="Ein Inhalt-background" style:family="presentation">
      <style:graphic-properties draw:stroke="none" draw:fill="solid" draw:fill-color="#ffffff"/>
      <style:text-properties style:letter-kerning="true"/>
    </style:style>
    <style:style style:name="Ein_20_Inhalt-backgroundobjects" style:display-name="Ein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_20_Inhalt-notes" style:display-name="Ein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_20_Inhalt-outline1" style:display-name="Ein Inhalt-outline1" style:family="presentation">
      <style:graphic-properties draw:stroke="none" draw:fill="none" draw:auto-grow-height="false" draw:fit-to-size="false" style:shrink-to-fit="true" style:writing-mode="lr-tb">
        <text:list-style style:name="Ein_20_Inhalt-outline1" style:display-name="Ein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_20_Inhalt-outline2" style:display-name="Ein Inhalt-outline2" style:family="presentation" style:parent-style-name="Ein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Ein_20_Inhalt-outline3" style:display-name="Ein Inhalt-outline3" style:family="presentation" style:parent-style-name="Ein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Ein_20_Inhalt-outline4" style:display-name="Ein Inhalt-outline4" style:family="presentation" style:parent-style-name="Ein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Ein_20_Inhalt-outline5" style:display-name="Ein Inhalt-outline5" style:family="presentation" style:parent-style-name="Ein_20_Inhalt-outline4">
      <style:paragraph-properties fo:margin-top="0.1cm" fo:margin-bottom="0cm"/>
      <style:text-properties fo:font-size="20pt" style:font-size-asian="20pt" style:font-size-complex="20pt"/>
    </style:style>
    <style:style style:name="Ein_20_Inhalt-outline6" style:display-name="Ein Inhalt-outline6" style:family="presentation" style:parent-style-name="Ein_20_Inhalt-outline5">
      <style:paragraph-properties fo:margin-top="0.1cm" fo:margin-bottom="0cm"/>
      <style:text-properties fo:font-size="20pt" style:font-size-asian="20pt" style:font-size-complex="20pt"/>
    </style:style>
    <style:style style:name="Ein_20_Inhalt-outline7" style:display-name="Ein Inhalt-outline7" style:family="presentation" style:parent-style-name="Ein_20_Inhalt-outline6">
      <style:paragraph-properties fo:margin-top="0.1cm" fo:margin-bottom="0cm"/>
      <style:text-properties fo:font-size="20pt" style:font-size-asian="20pt" style:font-size-complex="20pt"/>
    </style:style>
    <style:style style:name="Ein_20_Inhalt-outline8" style:display-name="Ein Inhalt-outline8" style:family="presentation" style:parent-style-name="Ein_20_Inhalt-outline7">
      <style:paragraph-properties fo:margin-top="0.1cm" fo:margin-bottom="0cm"/>
      <style:text-properties fo:font-size="20pt" style:font-size-asian="20pt" style:font-size-complex="20pt"/>
    </style:style>
    <style:style style:name="Ein_20_Inhalt-outline9" style:display-name="Ein Inhalt-outline9" style:family="presentation" style:parent-style-name="Ein_20_Inhalt-outline8">
      <style:paragraph-properties fo:margin-top="0.1cm" fo:margin-bottom="0cm"/>
      <style:text-properties fo:font-size="20pt" style:font-size-asian="20pt" style:font-size-complex="20pt"/>
    </style:style>
    <style:style style:name="Ein_20_Inhalt-subtitle" style:display-name="Ein Inhalt-subtitle" style:family="presentation">
      <style:graphic-properties draw:stroke="none" draw:fill="none" draw:textarea-vertical-align="middle">
        <text:list-style style:name="Ein_20_Inhalt-subtitle" style:display-name="Ein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_20_Inhalt-title" style:display-name="Ein Inhalt-title" style:family="presentation">
      <style:graphic-properties draw:stroke="none" draw:fill="none" draw:textarea-vertical-align="middle" style:writing-mode="lr-tb">
        <text:list-style style:name="Ein_20_Inhalt-title" style:display-name="Ein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rei_20_Inhalte_20__28_Variante_20_1_29_-background" style:display-name="Drei Inhalte (Variante 1)-background" style:family="presentation">
      <style:graphic-properties draw:stroke="none" draw:fill="solid" draw:fill-color="#ffffff"/>
      <style:text-properties style:letter-kerning="true"/>
    </style:style>
    <style:style style:name="Drei_20_Inhalte_20__28_Variante_20_1_29_-backgroundobjects" style:display-name="Drei Inhalte (Variante 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_20__28_Variante_20_1_29_-notes" style:display-name="Drei Inhalte (Variante 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_20__28_Variante_20_1_29_-outline1" style:display-name="Drei Inhalte (Variante 1)-outline1" style:family="presentation">
      <style:graphic-properties draw:stroke="none" draw:fill="none" draw:auto-grow-height="false" draw:fit-to-size="false" style:shrink-to-fit="true" style:writing-mode="lr-tb">
        <text:list-style style:name="Drei_20_Inhalte_20__28_Variante_20_1_29_-outline1" style:display-name="Drei Inhalte (Variante 1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_20__28_Variante_20_1_29_-outline2" style:display-name="Drei Inhalte (Variante 1)-outline2" style:family="presentation" style:parent-style-name="Drei_20_Inhalte_20__28_Variante_20_1_29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Drei_20_Inhalte_20__28_Variante_20_1_29_-outline3" style:display-name="Drei Inhalte (Variante 1)-outline3" style:family="presentation" style:parent-style-name="Drei_20_Inhalte_20__28_Variante_20_1_29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rei_20_Inhalte_20__28_Variante_20_1_29_-outline4" style:display-name="Drei Inhalte (Variante 1)-outline4" style:family="presentation" style:parent-style-name="Drei_20_Inhalte_20__28_Variante_20_1_29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Drei_20_Inhalte_20__28_Variante_20_1_29_-outline5" style:display-name="Drei Inhalte (Variante 1)-outline5" style:family="presentation" style:parent-style-name="Drei_20_Inhalte_20__28_Variante_20_1_29_-outline4">
      <style:paragraph-properties fo:margin-top="0.1cm" fo:margin-bottom="0cm"/>
      <style:text-properties fo:font-size="20pt" style:font-size-asian="20pt" style:font-size-complex="20pt"/>
    </style:style>
    <style:style style:name="Drei_20_Inhalte_20__28_Variante_20_1_29_-outline6" style:display-name="Drei Inhalte (Variante 1)-outline6" style:family="presentation" style:parent-style-name="Drei_20_Inhalte_20__28_Variante_20_1_29_-outline5">
      <style:paragraph-properties fo:margin-top="0.1cm" fo:margin-bottom="0cm"/>
      <style:text-properties fo:font-size="20pt" style:font-size-asian="20pt" style:font-size-complex="20pt"/>
    </style:style>
    <style:style style:name="Drei_20_Inhalte_20__28_Variante_20_1_29_-outline7" style:display-name="Drei Inhalte (Variante 1)-outline7" style:family="presentation" style:parent-style-name="Drei_20_Inhalte_20__28_Variante_20_1_29_-outline6">
      <style:paragraph-properties fo:margin-top="0.1cm" fo:margin-bottom="0cm"/>
      <style:text-properties fo:font-size="20pt" style:font-size-asian="20pt" style:font-size-complex="20pt"/>
    </style:style>
    <style:style style:name="Drei_20_Inhalte_20__28_Variante_20_1_29_-outline8" style:display-name="Drei Inhalte (Variante 1)-outline8" style:family="presentation" style:parent-style-name="Drei_20_Inhalte_20__28_Variante_20_1_29_-outline7">
      <style:paragraph-properties fo:margin-top="0.1cm" fo:margin-bottom="0cm"/>
      <style:text-properties fo:font-size="20pt" style:font-size-asian="20pt" style:font-size-complex="20pt"/>
    </style:style>
    <style:style style:name="Drei_20_Inhalte_20__28_Variante_20_1_29_-outline9" style:display-name="Drei Inhalte (Variante 1)-outline9" style:family="presentation" style:parent-style-name="Drei_20_Inhalte_20__28_Variante_20_1_29_-outline8">
      <style:paragraph-properties fo:margin-top="0.1cm" fo:margin-bottom="0cm"/>
      <style:text-properties fo:font-size="20pt" style:font-size-asian="20pt" style:font-size-complex="20pt"/>
    </style:style>
    <style:style style:name="Drei_20_Inhalte_20__28_Variante_20_1_29_-subtitle" style:display-name="Drei Inhalte (Variante 1)-subtitle" style:family="presentation">
      <style:graphic-properties draw:stroke="none" draw:fill="none" draw:textarea-vertical-align="middle">
        <text:list-style style:name="Drei_20_Inhalte_20__28_Variante_20_1_29_-subtitle" style:display-name="Drei Inhalte (Variante 1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_20__28_Variante_20_1_29_-title" style:display-name="Drei Inhalte (Variante 1)-title" style:family="presentation">
      <style:graphic-properties draw:stroke="none" draw:fill="none" draw:textarea-vertical-align="middle" style:writing-mode="lr-tb">
        <text:list-style style:name="Drei_20_Inhalte_20__28_Variante_20_1_29_-title" style:display-name="Drei Inhalte (Variante 1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rei_20_Inhalte_20__28_Variante_20_2_29_-background" style:display-name="Drei Inhalte (Variante 2)-background" style:family="presentation">
      <style:graphic-properties draw:stroke="none" draw:fill="solid" draw:fill-color="#ffffff"/>
      <style:text-properties style:letter-kerning="true"/>
    </style:style>
    <style:style style:name="Drei_20_Inhalte_20__28_Variante_20_2_29_-backgroundobjects" style:display-name="Drei Inhalte (Variante 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_20__28_Variante_20_2_29_-notes" style:display-name="Drei Inhalte (Variante 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_20__28_Variante_20_2_29_-outline1" style:display-name="Drei Inhalte (Variante 2)-outline1" style:family="presentation">
      <style:graphic-properties draw:stroke="none" draw:fill="none" draw:auto-grow-height="false" draw:fit-to-size="false" style:shrink-to-fit="true" style:writing-mode="lr-tb">
        <text:list-style style:name="Drei_20_Inhalte_20__28_Variante_20_2_29_-outline1" style:display-name="Drei Inhalte (Variante 2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_20__28_Variante_20_2_29_-outline2" style:display-name="Drei Inhalte (Variante 2)-outline2" style:family="presentation" style:parent-style-name="Drei_20_Inhalte_20__28_Variante_20_2_29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Drei_20_Inhalte_20__28_Variante_20_2_29_-outline3" style:display-name="Drei Inhalte (Variante 2)-outline3" style:family="presentation" style:parent-style-name="Drei_20_Inhalte_20__28_Variante_20_2_29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rei_20_Inhalte_20__28_Variante_20_2_29_-outline4" style:display-name="Drei Inhalte (Variante 2)-outline4" style:family="presentation" style:parent-style-name="Drei_20_Inhalte_20__28_Variante_20_2_29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Drei_20_Inhalte_20__28_Variante_20_2_29_-outline5" style:display-name="Drei Inhalte (Variante 2)-outline5" style:family="presentation" style:parent-style-name="Drei_20_Inhalte_20__28_Variante_20_2_29_-outline4">
      <style:paragraph-properties fo:margin-top="0.1cm" fo:margin-bottom="0cm"/>
      <style:text-properties fo:font-size="20pt" style:font-size-asian="20pt" style:font-size-complex="20pt"/>
    </style:style>
    <style:style style:name="Drei_20_Inhalte_20__28_Variante_20_2_29_-outline6" style:display-name="Drei Inhalte (Variante 2)-outline6" style:family="presentation" style:parent-style-name="Drei_20_Inhalte_20__28_Variante_20_2_29_-outline5">
      <style:paragraph-properties fo:margin-top="0.1cm" fo:margin-bottom="0cm"/>
      <style:text-properties fo:font-size="20pt" style:font-size-asian="20pt" style:font-size-complex="20pt"/>
    </style:style>
    <style:style style:name="Drei_20_Inhalte_20__28_Variante_20_2_29_-outline7" style:display-name="Drei Inhalte (Variante 2)-outline7" style:family="presentation" style:parent-style-name="Drei_20_Inhalte_20__28_Variante_20_2_29_-outline6">
      <style:paragraph-properties fo:margin-top="0.1cm" fo:margin-bottom="0cm"/>
      <style:text-properties fo:font-size="20pt" style:font-size-asian="20pt" style:font-size-complex="20pt"/>
    </style:style>
    <style:style style:name="Drei_20_Inhalte_20__28_Variante_20_2_29_-outline8" style:display-name="Drei Inhalte (Variante 2)-outline8" style:family="presentation" style:parent-style-name="Drei_20_Inhalte_20__28_Variante_20_2_29_-outline7">
      <style:paragraph-properties fo:margin-top="0.1cm" fo:margin-bottom="0cm"/>
      <style:text-properties fo:font-size="20pt" style:font-size-asian="20pt" style:font-size-complex="20pt"/>
    </style:style>
    <style:style style:name="Drei_20_Inhalte_20__28_Variante_20_2_29_-outline9" style:display-name="Drei Inhalte (Variante 2)-outline9" style:family="presentation" style:parent-style-name="Drei_20_Inhalte_20__28_Variante_20_2_29_-outline8">
      <style:paragraph-properties fo:margin-top="0.1cm" fo:margin-bottom="0cm"/>
      <style:text-properties fo:font-size="20pt" style:font-size-asian="20pt" style:font-size-complex="20pt"/>
    </style:style>
    <style:style style:name="Drei_20_Inhalte_20__28_Variante_20_2_29_-subtitle" style:display-name="Drei Inhalte (Variante 2)-subtitle" style:family="presentation">
      <style:graphic-properties draw:stroke="none" draw:fill="none" draw:textarea-vertical-align="middle">
        <text:list-style style:name="Drei_20_Inhalte_20__28_Variante_20_2_29_-subtitle" style:display-name="Drei Inhalte (Variante 2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_20__28_Variante_20_2_29_-title" style:display-name="Drei Inhalte (Variante 2)-title" style:family="presentation">
      <style:graphic-properties draw:stroke="none" draw:fill="none" draw:textarea-vertical-align="middle" style:writing-mode="lr-tb">
        <text:list-style style:name="Drei_20_Inhalte_20__28_Variante_20_2_29_-title" style:display-name="Drei Inhalte (Variante 2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ier_20_Inhalte-background" style:display-name="Vier Inhalte-background" style:family="presentation">
      <style:graphic-properties draw:stroke="none" draw:fill="solid" draw:fill-color="#ffffff"/>
      <style:text-properties style:letter-kerning="true"/>
    </style:style>
    <style:style style:name="Vier_20_Inhalte-backgroundobjects" style:display-name="Vier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r_20_Inhalte-notes" style:display-name="Vier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_20_Inhalte-outline1" style:display-name="Vier Inhalte-outline1" style:family="presentation">
      <style:graphic-properties draw:stroke="none" draw:fill="none" draw:auto-grow-height="false" draw:fit-to-size="false" style:shrink-to-fit="true" style:writing-mode="lr-tb">
        <text:list-style style:name="Vier_20_Inhalte-outline1" style:display-name="Vier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_20_Inhalte-outline2" style:display-name="Vier Inhalte-outline2" style:family="presentation" style:parent-style-name="Vier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Vier_20_Inhalte-outline3" style:display-name="Vier Inhalte-outline3" style:family="presentation" style:parent-style-name="Vier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Vier_20_Inhalte-outline4" style:display-name="Vier Inhalte-outline4" style:family="presentation" style:parent-style-name="Vier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Vier_20_Inhalte-outline5" style:display-name="Vier Inhalte-outline5" style:family="presentation" style:parent-style-name="Vier_20_Inhalte-outline4">
      <style:paragraph-properties fo:margin-top="0.1cm" fo:margin-bottom="0cm"/>
      <style:text-properties fo:font-size="20pt" style:font-size-asian="20pt" style:font-size-complex="20pt"/>
    </style:style>
    <style:style style:name="Vier_20_Inhalte-outline6" style:display-name="Vier Inhalte-outline6" style:family="presentation" style:parent-style-name="Vier_20_Inhalte-outline5">
      <style:paragraph-properties fo:margin-top="0.1cm" fo:margin-bottom="0cm"/>
      <style:text-properties fo:font-size="20pt" style:font-size-asian="20pt" style:font-size-complex="20pt"/>
    </style:style>
    <style:style style:name="Vier_20_Inhalte-outline7" style:display-name="Vier Inhalte-outline7" style:family="presentation" style:parent-style-name="Vier_20_Inhalte-outline6">
      <style:paragraph-properties fo:margin-top="0.1cm" fo:margin-bottom="0cm"/>
      <style:text-properties fo:font-size="20pt" style:font-size-asian="20pt" style:font-size-complex="20pt"/>
    </style:style>
    <style:style style:name="Vier_20_Inhalte-outline8" style:display-name="Vier Inhalte-outline8" style:family="presentation" style:parent-style-name="Vier_20_Inhalte-outline7">
      <style:paragraph-properties fo:margin-top="0.1cm" fo:margin-bottom="0cm"/>
      <style:text-properties fo:font-size="20pt" style:font-size-asian="20pt" style:font-size-complex="20pt"/>
    </style:style>
    <style:style style:name="Vier_20_Inhalte-outline9" style:display-name="Vier Inhalte-outline9" style:family="presentation" style:parent-style-name="Vier_20_Inhalte-outline8">
      <style:paragraph-properties fo:margin-top="0.1cm" fo:margin-bottom="0cm"/>
      <style:text-properties fo:font-size="20pt" style:font-size-asian="20pt" style:font-size-complex="20pt"/>
    </style:style>
    <style:style style:name="Vier_20_Inhalte-subtitle" style:display-name="Vier Inhalte-subtitle" style:family="presentation">
      <style:graphic-properties draw:stroke="none" draw:fill="none" draw:textarea-vertical-align="middle">
        <text:list-style style:name="Vier_20_Inhalte-subtitle" style:display-name="Vier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r_20_Inhalte-title" style:display-name="Vier Inhalte-title" style:family="presentation">
      <style:graphic-properties draw:stroke="none" draw:fill="none" draw:textarea-vertical-align="middle" style:writing-mode="lr-tb">
        <text:list-style style:name="Vier_20_Inhalte-title" style:display-name="Vier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_20_und_20_Fußzeile-background" style:display-name="Nur Titel und Fußzeile-background" style:family="presentation">
      <style:graphic-properties draw:stroke="none" draw:fill="solid" draw:fill-color="#ffffff"/>
      <style:text-properties style:letter-kerning="true"/>
    </style:style>
    <style:style style:name="Nur_20_Titel_20_und_20_Fußzeile-backgroundobjects" style:display-name="Nur Titel und Fuß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_20_und_20_Fußzeile-notes" style:display-name="Nur Titel und Fußzei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_20_und_20_Fußzeile-outline1" style:display-name="Nur Titel und Fußzeile-outline1" style:family="presentation">
      <style:graphic-properties draw:stroke="none" draw:fill="none" draw:auto-grow-height="false" draw:fit-to-size="false" style:shrink-to-fit="true" style:writing-mode="lr-tb">
        <text:list-style style:name="Nur_20_Titel_20_und_20_Fußzeile-outline1" style:display-name="Nur Titel und Fußzei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_20_und_20_Fußzeile-outline2" style:display-name="Nur Titel und Fußzeile-outline2" style:family="presentation" style:parent-style-name="Nur_20_Titel_20_und_20_Fußzeil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Nur_20_Titel_20_und_20_Fußzeile-outline3" style:display-name="Nur Titel und Fußzeile-outline3" style:family="presentation" style:parent-style-name="Nur_20_Titel_20_und_20_Fußzeil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Nur_20_Titel_20_und_20_Fußzeile-outline4" style:display-name="Nur Titel und Fußzeile-outline4" style:family="presentation" style:parent-style-name="Nur_20_Titel_20_und_20_Fußzeil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Nur_20_Titel_20_und_20_Fußzeile-outline5" style:display-name="Nur Titel und Fußzeile-outline5" style:family="presentation" style:parent-style-name="Nur_20_Titel_20_und_20_Fußzeile-outline4">
      <style:paragraph-properties fo:margin-top="0.1cm" fo:margin-bottom="0cm"/>
      <style:text-properties fo:font-size="20pt" style:font-size-asian="20pt" style:font-size-complex="20pt"/>
    </style:style>
    <style:style style:name="Nur_20_Titel_20_und_20_Fußzeile-outline6" style:display-name="Nur Titel und Fußzeile-outline6" style:family="presentation" style:parent-style-name="Nur_20_Titel_20_und_20_Fußzeile-outline5">
      <style:paragraph-properties fo:margin-top="0.1cm" fo:margin-bottom="0cm"/>
      <style:text-properties fo:font-size="20pt" style:font-size-asian="20pt" style:font-size-complex="20pt"/>
    </style:style>
    <style:style style:name="Nur_20_Titel_20_und_20_Fußzeile-outline7" style:display-name="Nur Titel und Fußzeile-outline7" style:family="presentation" style:parent-style-name="Nur_20_Titel_20_und_20_Fußzeile-outline6">
      <style:paragraph-properties fo:margin-top="0.1cm" fo:margin-bottom="0cm"/>
      <style:text-properties fo:font-size="20pt" style:font-size-asian="20pt" style:font-size-complex="20pt"/>
    </style:style>
    <style:style style:name="Nur_20_Titel_20_und_20_Fußzeile-outline8" style:display-name="Nur Titel und Fußzeile-outline8" style:family="presentation" style:parent-style-name="Nur_20_Titel_20_und_20_Fußzeile-outline7">
      <style:paragraph-properties fo:margin-top="0.1cm" fo:margin-bottom="0cm"/>
      <style:text-properties fo:font-size="20pt" style:font-size-asian="20pt" style:font-size-complex="20pt"/>
    </style:style>
    <style:style style:name="Nur_20_Titel_20_und_20_Fußzeile-outline9" style:display-name="Nur Titel und Fußzeile-outline9" style:family="presentation" style:parent-style-name="Nur_20_Titel_20_und_20_Fußzeile-outline8">
      <style:paragraph-properties fo:margin-top="0.1cm" fo:margin-bottom="0cm"/>
      <style:text-properties fo:font-size="20pt" style:font-size-asian="20pt" style:font-size-complex="20pt"/>
    </style:style>
    <style:style style:name="Nur_20_Titel_20_und_20_Fußzeile-subtitle" style:display-name="Nur Titel und Fußzeile-subtitle" style:family="presentation">
      <style:graphic-properties draw:stroke="none" draw:fill="none" draw:textarea-vertical-align="middle">
        <text:list-style style:name="Nur_20_Titel_20_und_20_Fußzeile-subtitle" style:display-name="Nur Titel und Fußzei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_20_und_20_Fußzeile-title" style:display-name="Nur Titel und Fußzeile-title" style:family="presentation">
      <style:graphic-properties draw:stroke="none" draw:fill="none" draw:textarea-vertical-align="middle" style:writing-mode="lr-tb">
        <text:list-style style:name="Nur_20_Titel_20_und_20_Fußzeile-title" style:display-name="Nur Titel und Fußzei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iteraturverzeichnis-background" style:family="presentation">
      <style:graphic-properties draw:stroke="none" draw:fill="solid" draw:fill-color="#ffffff"/>
      <style:text-properties style:letter-kerning="true"/>
    </style:style>
    <style:style style:name="Literaturverzeichn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teraturverzeichn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teraturverzeichnis-outline1" style:family="presentation">
      <style:graphic-properties draw:stroke="none" draw:fill="none" draw:auto-grow-height="false" draw:fit-to-size="false" style:shrink-to-fit="true" style:writing-mode="lr-tb">
        <text:list-style style:name="Literaturverzeichni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teraturverzeichnis-outline2" style:family="presentation" style:parent-style-name="Literaturverzeichni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Literaturverzeichnis-outline3" style:family="presentation" style:parent-style-name="Literaturverzeichni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Literaturverzeichnis-outline4" style:family="presentation" style:parent-style-name="Literaturverzeichni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Literaturverzeichnis-outline5" style:family="presentation" style:parent-style-name="Literaturverzeichnis-outline4">
      <style:paragraph-properties fo:margin-top="0.1cm" fo:margin-bottom="0cm"/>
      <style:text-properties fo:font-size="20pt" style:font-size-asian="20pt" style:font-size-complex="20pt"/>
    </style:style>
    <style:style style:name="Literaturverzeichnis-outline6" style:family="presentation" style:parent-style-name="Literaturverzeichnis-outline5">
      <style:paragraph-properties fo:margin-top="0.1cm" fo:margin-bottom="0cm"/>
      <style:text-properties fo:font-size="20pt" style:font-size-asian="20pt" style:font-size-complex="20pt"/>
    </style:style>
    <style:style style:name="Literaturverzeichnis-outline7" style:family="presentation" style:parent-style-name="Literaturverzeichnis-outline6">
      <style:paragraph-properties fo:margin-top="0.1cm" fo:margin-bottom="0cm"/>
      <style:text-properties fo:font-size="20pt" style:font-size-asian="20pt" style:font-size-complex="20pt"/>
    </style:style>
    <style:style style:name="Literaturverzeichnis-outline8" style:family="presentation" style:parent-style-name="Literaturverzeichnis-outline7">
      <style:paragraph-properties fo:margin-top="0.1cm" fo:margin-bottom="0cm"/>
      <style:text-properties fo:font-size="20pt" style:font-size-asian="20pt" style:font-size-complex="20pt"/>
    </style:style>
    <style:style style:name="Literaturverzeichnis-outline9" style:family="presentation" style:parent-style-name="Literaturverzeichnis-outline8">
      <style:paragraph-properties fo:margin-top="0.1cm" fo:margin-bottom="0cm"/>
      <style:text-properties fo:font-size="20pt" style:font-size-asian="20pt" style:font-size-complex="20pt"/>
    </style:style>
    <style:style style:name="Literaturverzeichnis-subtitle" style:family="presentation">
      <style:graphic-properties draw:stroke="none" draw:fill="none" draw:textarea-vertical-align="middle">
        <text:list-style style:name="Literaturverzeichni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teraturverzeichnis-title" style:family="presentation">
      <style:graphic-properties draw:stroke="none" draw:fill="none" draw:textarea-vertical-align="middle" style:writing-mode="lr-tb">
        <text:list-style style:name="Literaturverzeichni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inition_20_von_20_Standard-Formaten-background" style:display-name="Definition von Standard-Formaten-background" style:family="presentation">
      <style:graphic-properties draw:stroke="none" draw:fill="solid" draw:fill-color="#ffffff"/>
      <style:text-properties style:letter-kerning="true"/>
    </style:style>
    <style:style style:name="Definition_20_von_20_Standard-Formaten-backgroundobjects" style:display-name="Definition von Standard-Forma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inition_20_von_20_Standard-Formaten-notes" style:display-name="Definition von Standard-Forma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inition_20_von_20_Standard-Formaten-outline1" style:display-name="Definition von Standard-Formaten-outline1" style:family="presentation">
      <style:graphic-properties draw:stroke="none" draw:fill="none" draw:auto-grow-height="false" draw:fit-to-size="false" style:shrink-to-fit="true" style:writing-mode="lr-tb">
        <text:list-style style:name="Definition_20_von_20_Standard-Formaten-outline1" style:display-name="Definition von Standard-Forma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inition_20_von_20_Standard-Formaten-outline2" style:display-name="Definition von Standard-Formaten-outline2" style:family="presentation" style:parent-style-name="Definition_20_von_20_Standard-Formate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ヒラギノ角ゴ Pro W3" style:font-family-asian="'ヒラギノ角ゴ Pro W3'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Definition_20_von_20_Standard-Formaten-outline3" style:display-name="Definition von Standard-Formaten-outline3" style:family="presentation" style:parent-style-name="Definition_20_von_20_Standard-Formate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ヒラギノ角ゴ Pro W3" style:font-family-asian="'ヒラギノ角ゴ Pro W3'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inition_20_von_20_Standard-Formaten-outline4" style:display-name="Definition von Standard-Formaten-outline4" style:family="presentation" style:parent-style-name="Definition_20_von_20_Standard-Formate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Arial" style:font-family-asian="Arial" style:font-size-asian="12pt" style:font-style-asian="normal" style:font-weight-asian="normal" style:font-name-complex="Arial" style:font-family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Definition_20_von_20_Standard-Formaten-outline5" style:display-name="Definition von Standard-Formaten-outline5" style:family="presentation" style:parent-style-name="Definition_20_von_20_Standard-Formaten-outline4">
      <style:paragraph-properties fo:margin-top="0.1cm" fo:margin-bottom="0cm"/>
      <style:text-properties fo:font-size="20pt" style:font-size-asian="20pt" style:font-size-complex="20pt"/>
    </style:style>
    <style:style style:name="Definition_20_von_20_Standard-Formaten-outline6" style:display-name="Definition von Standard-Formaten-outline6" style:family="presentation" style:parent-style-name="Definition_20_von_20_Standard-Formaten-outline5">
      <style:paragraph-properties fo:margin-top="0.1cm" fo:margin-bottom="0cm"/>
      <style:text-properties fo:font-size="20pt" style:font-size-asian="20pt" style:font-size-complex="20pt"/>
    </style:style>
    <style:style style:name="Definition_20_von_20_Standard-Formaten-outline7" style:display-name="Definition von Standard-Formaten-outline7" style:family="presentation" style:parent-style-name="Definition_20_von_20_Standard-Formaten-outline6">
      <style:paragraph-properties fo:margin-top="0.1cm" fo:margin-bottom="0cm"/>
      <style:text-properties fo:font-size="20pt" style:font-size-asian="20pt" style:font-size-complex="20pt"/>
    </style:style>
    <style:style style:name="Definition_20_von_20_Standard-Formaten-outline8" style:display-name="Definition von Standard-Formaten-outline8" style:family="presentation" style:parent-style-name="Definition_20_von_20_Standard-Formaten-outline7">
      <style:paragraph-properties fo:margin-top="0.1cm" fo:margin-bottom="0cm"/>
      <style:text-properties fo:font-size="20pt" style:font-size-asian="20pt" style:font-size-complex="20pt"/>
    </style:style>
    <style:style style:name="Definition_20_von_20_Standard-Formaten-outline9" style:display-name="Definition von Standard-Formaten-outline9" style:family="presentation" style:parent-style-name="Definition_20_von_20_Standard-Formaten-outline8">
      <style:paragraph-properties fo:margin-top="0.1cm" fo:margin-bottom="0cm"/>
      <style:text-properties fo:font-size="20pt" style:font-size-asian="20pt" style:font-size-complex="20pt"/>
    </style:style>
    <style:style style:name="Definition_20_von_20_Standard-Formaten-subtitle" style:display-name="Definition von Standard-Formaten-subtitle" style:family="presentation">
      <style:graphic-properties draw:stroke="none" draw:fill="none" draw:textarea-vertical-align="middle">
        <text:list-style style:name="Definition_20_von_20_Standard-Formaten-subtitle" style:display-name="Definition von Standard-Forma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inition_20_von_20_Standard-Formaten-title" style:display-name="Definition von Standard-Formaten-title" style:family="presentation">
      <style:graphic-properties draw:stroke="none" draw:fill="none" draw:textarea-vertical-align="middle" style:writing-mode="lr-tb">
        <text:list-style style:name="Definition_20_von_20_Standard-Formaten-title" style:display-name="Definition von Standard-Forma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06cm, 2.046cm, 4.246cm, 1.294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4">
      <style:graphic-properties draw:stroke="none" svg:stroke-width="0cm" draw:fill="solid" draw:fill-color="#004c93" draw:textarea-horizontal-align="justify" draw:textarea-vertical-align="top" draw:auto-grow-height="false" draw:fit-to-size="false" style:shrink-to-fit="false" fo:min-height="0cm" fo:min-width="0cm" fo:padding-top="0.4cm" fo:padding-bottom="0.1cm" fo:padding-left="0.1cm" fo:padding-right="0cm" fo:wrap-option="wrap" loext:decorative="false">
        <loext:fill-complex-color loext:theme-type="dark2" loext:color-type="theme"/>
      </style:graphic-properties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solid" draw:fill-color="#004c93" draw:textarea-horizontal-align="justify" draw:textarea-vertical-align="top" draw:auto-grow-height="false" draw:fit-to-size="false" style:shrink-to-fit="false" fo:min-height="0cm" fo:min-width="0cm" fo:padding-top="0.4cm" fo:padding-bottom="0.1cm" fo:padding-left="0.1cm" fo:padding-right="0cm" fo:wrap-option="wrap" loext:decorative="false">
        <loext:fill-complex-color loext:theme-type="dark2" loext:color-type="theme"/>
      </style:graphic-properties>
      <style:paragraph-properties style:writing-mode="lr-tb"/>
    </style:style>
    <style:style style:name="Mgr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9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0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3" style:family="graphic" style:parent-style-name="standard">
      <style:graphic-properties draw:stroke="solid" svg:stroke-width="0cm" svg:stroke-color="#000000" draw:fill="solid" draw:fill-color="#efe4b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2" loext:color-type="theme"/>
      </style:graphic-properties>
    </style:style>
    <style:style style:name="Mgr1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6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0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6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30" style:family="graphic" style:parent-style-name="standard">
      <style:graphic-properties draw:stroke="solid" svg:stroke-width="0.026cm" svg:stroke-color="#000000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loext:decorative="false">
        <loext:stroke-complex-color loext:theme-type="dark1" loext:color-type="theme"/>
      </style:graphic-properties>
    </style:style>
    <style:style style:name="Mgr31" style:family="graphic" style:parent-style-name="standard" style:list-style-name="ML18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folie_20_mit_20_Untertitel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folie_20_mit_20_Unter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elfolie_20_mit_20_Unter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elfolie_20_mit_20_Störer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elfolie_20_mit_20_Stör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folie_20_mit_20_Stör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elfolie_20_mit_20_Untertitel_20_und_20_Störer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elfolie_20_mit_20_Untertitel_20_und_20_Stör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elfolie_20_mit_20_Untertitel_20_und_20_Stör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Kapitaltrenner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Kapitaltrenn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Kapitaltrenn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Kapitaltrenner_20_mit_20_Unterkapitel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Kapitaltrenner_20_mit_20_Unterkap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Kapitaltrenner_20_mit_20_Unterkap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Ab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Ab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Ein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Ein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Ein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Ein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Ein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rei_20_Inhalte_20__28_Variante_20_1_29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Drei_20_Inhalte_20__28_Variante_20_1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Drei_20_Inhalte_20__28_Variante_20_1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Drei_20_Inhalte_20__28_Variante_20_1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Drei_20_Inhalte_20__28_Variante_20_1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Drei_20_Inhalte_20__28_Variante_20_2_29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Drei_20_Inhalte_20__28_Variante_20_2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Drei_20_Inhalte_20__28_Variante_20_2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Drei_20_Inhalte_20__28_Variante_20_2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Drei_20_Inhalte_20__28_Variante_20_2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Vier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Vier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Vier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Nur_20_Titel_20_und_20_Fußzei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Nur_20_Titel_20_und_20_Fußzei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3cm" fo:padding-bottom="0.13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Nur_20_Titel_20_und_20_Fußzei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Nur_20_Titel_20_und_20_Fußzei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Le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Literaturverzeichni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Literaturverzeichni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cm" fo:padding-bottom="0.5cm" fo:padding-left="0.5cm" fo:padding-right="0.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Literaturverzeichn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Literaturverzeichn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inition_20_von_20_Standard-Formate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.5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8" style:family="presentation" style:parent-style-name="Definition_20_von_20_Standard-Format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Definition_20_von_20_Standard-Format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2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solid" draw:fill-color="#004c93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1.27cm" style:font-independent-line-spacing="true">
        <style:tab-stops/>
      </style:paragraph-properties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0" style:family="paragraph">
      <style:paragraph-properties fo:margin-left="0cm" fo:margin-right="0cm" fo:margin-top="0cm" fo:margin-bottom="0.176cm" fo:line-height="100%" fo:text-align="start" fo:text-indent="0cm" loext:tab-stop-distance="1.27cm" style:writing-mode="lr-tb">
        <style:tab-stops/>
      </style:paragraph-properties>
    </style:style>
    <style:style style:name="MP21" style:family="paragraph">
      <loext:graphic-properties draw:fill="solid" draw:fill-color="#efe4b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ヒラギノ角ゴ Pro W3" style:font-size-asian="16pt" style:font-style-asian="normal" style:font-weight-asian="normal" style:font-name-complex="ヒラギノ角ゴ Pro W3" style:font-size-complex="16pt" style:font-style-complex="normal" style:font-weight-complex="normal">
        <loext:char-complex-color loext:theme-type="dark1" loext:color-type="theme"/>
      </style:text-properties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247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font-size="20pt"/>
    </style:style>
    <style:style style:name="MP25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20pt"/>
    </style:style>
    <style:style style:name="MP26" style:family="paragraph">
      <style:paragraph-properties fo:margin-left="0cm" fo:margin-right="0cm" fo:margin-top="0cm" fo:margin-bottom="0.176cm" fo:line-height="100%" fo:text-align="start" fo:text-indent="0cm" style:punctuation-wrap="hanging" loext:tab-stop-distance="1.27cm" style:writing-mode="lr-tb">
        <style:tab-stops/>
      </style:paragraph-properties>
      <style:text-properties fo:font-size="20pt"/>
    </style:style>
    <style:style style:name="MP27" style:family="paragraph">
      <style:paragraph-properties fo:margin-left="0cm" fo:margin-right="0cm" fo:margin-top="0cm" fo:margin-bottom="0.141cm" fo:line-height="100%" fo:text-align="start" fo:text-indent="0cm" style:punctuation-wrap="hanging" loext:tab-stop-distance="1.27cm" style:writing-mode="lr-tb">
        <style:tab-stops/>
      </style:paragraph-properties>
      <style:text-properties fo:font-size="20pt"/>
    </style:style>
    <style:style style:name="MP28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font-size="20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0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32" style:family="paragraph">
      <style:paragraph-properties fo:margin-left="0cm" fo:margin-right="0cm" fo:margin-top="0.247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0pt"/>
    </style:style>
    <style:style style:name="MP33" style:family="paragraph">
      <style:paragraph-properties fo:margin-left="0cm" fo:margin-right="0cm" fo:margin-top="0.247cm" fo:margin-bottom="0.141cm" fo:line-height="100%" fo:text-align="start" fo:text-indent="0cm" style:punctuation-wrap="hanging" loext:tab-stop-distance="1.27cm" style:writing-mode="lr-tb">
        <style:tab-stops/>
      </style:paragraph-properties>
      <style:text-properties fo:font-size="14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5" style:family="paragraph">
      <loext:graphic-properties draw:fill="none"/>
      <style:paragraph-properties fo:margin-left="0cm" fo:margin-right="0cm" fo:margin-top="0cm" fo:margin-bottom="0.176cm" fo:line-height="100%" fo:text-align="start" fo:text-indent="0cm" loext:tab-stop-distance="1.27cm" style:font-independent-line-spacing="true">
        <style:tab-stops/>
      </style:paragraph-properties>
      <style:text-properties fo:font-size="18pt"/>
    </style:style>
    <style:style style:name="MT1" style:family="text">
      <style:text-properties fo:font-variant="normal" fo:text-transform="none" fo:color="#004c93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4c9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4c93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#ffff00" style:font-name-asian="ヒラギノ角ゴ Pro W3" style:font-size-asian="10pt" style:font-style-asian="normal" style:font-weight-asian="normal" style:font-name-complex="ヒラギノ角ゴ Pro W3" style:font-size-complex="1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4c92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name-asian="ヒラギノ角ゴ Pro W3" style:font-size-asian="32pt" style:font-style-asian="normal" style:font-weight-asian="bold" style:font-name-complex="ヒラギノ角ゴ Pro W3" style:font-size-complex="32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4c92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name-asian="ヒラギノ角ゴ Pro W3" style:font-size-asian="14pt" style:font-style-asian="normal" style:font-weight-asian="bold" style:font-name-complex="ヒラギノ角ゴ Pro W3" style:font-size-complex="14pt" style:font-style-complex="normal" style:font-weight-complex="bold"/>
    </style:style>
    <style:style style:name="MT9" style:family="text">
      <style:text-properties fo:font-variant="normal" fo:text-transform="none" fo:color="#004c92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#ffff00" style:font-name-asian="ヒラギノ角ゴ Pro W3" style:font-size-asian="14pt" style:font-style-asian="normal" style:font-weight-asian="normal" style:font-name-complex="ヒラギノ角ゴ Pro W3" style:font-size-complex="14pt" style:font-style-complex="normal" style:font-weight-complex="normal"/>
    </style:style>
    <style:style style:name="MT10" style:family="text">
      <style:text-properties fo:font-variant="normal" fo:text-transform="none" fo:color="#004c92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ヒラギノ角ゴ Pro W3" style:font-size-asian="14pt" style:font-style-asian="normal" style:font-weight-asian="normal" style:font-name-complex="ヒラギノ角ゴ Pro W3" style:font-size-complex="1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name-asian="ヒラギノ角ゴ Pro W3" style:font-size-asian="8pt" style:font-style-asian="normal" style:font-weight-asian="normal" style:font-name-complex="ヒラギノ角ゴ Pro W3" style:font-size-complex="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ヒラギノ角ゴ Pro W3" style:font-size-asian="16pt" style:font-style-asian="normal" style:font-weight-asian="normal" style:font-name-complex="ヒラギノ角ゴ Pro W3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e121b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name-asian="ヒラギノ角ゴ Pro W3" style:font-size-asian="24pt" style:font-style-asian="normal" style:font-weight-asian="bold" style:font-name-complex="Arial" style:font-size-complex="24pt" style:font-style-complex="normal" style:font-weight-complex="bold">
        <loext:char-complex-color loext:theme-type="accent6" loext:color-type="theme">
          <loext:transformation loext:type="lummod" loext:value="1000"/>
        </loext:char-complex-color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ヒラギノ角ゴ Pro W3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ヒラギノ角ゴ Pro W3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ヒラギノ角ゴ Pro W3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ヒラギノ角ゴ Pro W3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name-asian="ヒラギノ角ゴ Pro W3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name-asian="ヒラギノ角ゴ Pro W3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ヒラギノ角ゴ Pro W3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4c9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4c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0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0e12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7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75cm"/>
        <style:text-properties style:font-name="Arial" fo:color="#000000" fo:font-size="100%"/>
      </text:list-level-style-bullet>
      <text:list-level-style-bullet text:level="2" text:bullet-char="o">
        <style:list-level-properties text:space-before="1cm" text:min-label-width="0.75cm"/>
        <style:text-properties fo:font-family="'Courier New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75cm"/>
        <style:text-properties style:font-name="Arial" fo:color="#000000" fo:font-size="100%"/>
      </text:list-level-style-bullet>
      <text:list-level-style-bullet text:level="2" text:bullet-char="o">
        <style:list-level-properties text:space-before="1cm" text:min-label-width="0.75cm"/>
        <style:text-properties fo:font-family="'Courier New'" fo:color="#000000" fo:font-size="100%"/>
      </text:list-level-style-bullet>
      <text:list-level-style-bullet text:level="3" text:bullet-char="">
        <style:list-level-properties text:space-before="2cm" text:min-label-width="0.66cm"/>
        <style:text-properties fo:font-family="Wingdings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75cm"/>
        <style:text-properties style:font-name="Arial" fo:color="#000000" fo:font-size="100%"/>
      </text:list-level-style-bullet>
      <text:list-level-style-bullet text:level="2" text:bullet-char="o">
        <style:list-level-properties text:space-before="1cm" text:min-label-width="0.75cm"/>
        <style:text-properties fo:font-family="'Courier New'" fo:color="#000000" fo:font-size="100%"/>
      </text:list-level-style-bullet>
      <text:list-level-style-bullet text:level="3" text:bullet-char="">
        <style:list-level-properties text:space-before="2cm" text:min-label-width="0.66cm"/>
        <style:text-properties fo:font-family="Wingdings" style:font-charset="x-symbol" fo:color="#000000" fo:font-size="100%"/>
      </text:list-level-style-bullet>
      <text:list-level-style-bullet text:level="4" text:bullet-char="">
        <style:list-level-properties text:space-before="3.002cm" text:min-label-width="0.498cm"/>
        <style:text-properties fo:font-family="Symbol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75cm"/>
        <style:text-properties style:font-name="Arial" fo:color="#000000" fo:font-size="100%"/>
      </text:list-level-style-bullet>
      <text:list-level-style-bullet text:level="2" text:bullet-char="o">
        <style:list-level-properties text:space-before="1cm" text:min-label-width="0.75cm"/>
        <style:text-properties fo:font-family="'Courier New'" fo:color="#000000" fo:font-size="100%"/>
      </text:list-level-style-bullet>
      <text:list-level-style-bullet text:level="3" text:bullet-char="">
        <style:list-level-properties text:space-before="2cm" text:min-label-width="0.66cm"/>
        <style:text-properties fo:font-family="Wingdings" style:font-charset="x-symbol" fo:color="#000000" fo:font-size="100%"/>
      </text:list-level-style-bullet>
      <text:list-level-style-bullet text:level="4" text:bullet-char="">
        <style:list-level-properties text:space-before="3.002cm" text:min-label-width="0.498cm"/>
        <style:text-properties fo:font-family="Symbol" style:font-charset="x-symbol" fo:color="#000000" fo:font-size="100%"/>
      </text:list-level-style-bullet>
      <text:list-level-style-bullet text:level="5" text:bullet-char="•">
        <style:list-level-properties text:space-before="3.75cm" text:min-label-width="0.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49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51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frame draw:name="Textplatzhalter 7" presentation:style-name="Mpr1" draw:text-style-name="MP6" draw:layer="backgroundobjects" svg:width="25.196cm" svg:height="4.455cm" svg:x="1.466cm" svg:y="12.032cm" presentation:class="outline" presentation:user-transformed="true">
        <draw:text-box>
          <text:p text:style-name="MP5"><text:span text:style-name="MT1">Titel der Präsentation</text:span></text:p>
        </draw:text-box>
      </draw:frame>
      <draw:frame draw:name="Grafik 7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10" draw:style-name="Mgr4" draw:text-style-name="MP7" draw:layer="backgroundobjects" svg:width="6.651cm" svg:height="2.58cm" svg:x="27.215cm" svg:y="15.596cm">
        <draw:image xlink:href="Pictures/10000001000007D0000003083AEBB544.png" xlink:type="simple" xlink:show="embed" xlink:actuate="onLoad" draw:mime-type="image/png">
          <text:p/>
        </draw:image>
      </draw:frame>
      <draw:frame draw:name="Textplatzhalter 7" presentation:style-name="Mpr1" draw:text-style-name="MP9" draw:layer="backgroundobjects" svg:width="25.196cm" svg:height="0.948cm" svg:x="1.466cm" svg:y="17.32cm" presentation:class="outline" presentation:user-transformed="true">
        <draw:text-box>
          <text:p text:style-name="MP8"><text:span text:style-name="MT2">Vortragende/r</text:span></text:p>
        </draw:text-box>
      </draw:frame>
      <draw:frame draw:name="Bild 6" draw:style-name="Mgr4" draw:text-style-name="MP7" draw:layer="backgroundobjects" svg:width="3.601cm" svg:height="3.045cm" svg:x="28.798cm" svg:y="11.741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frame presentation:style-name="Titelfoli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20_mit_20_Untertitel" style:display-name="Titelfolie mit Untertitel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frame draw:name="Grafik 7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10" draw:style-name="Mgr4" draw:text-style-name="MP7" draw:layer="backgroundobjects" svg:width="6.651cm" svg:height="2.58cm" svg:x="27.215cm" svg:y="15.596cm">
        <draw:image xlink:href="Pictures/10000001000007D0000003083AEBB544.png" xlink:type="simple" xlink:show="embed" xlink:actuate="onLoad" draw:mime-type="image/png">
          <text:p/>
        </draw:image>
      </draw:frame>
      <draw:frame draw:name="Textplatzhalter 7" presentation:style-name="Mpr4" draw:text-style-name="MP9" draw:layer="backgroundobjects" svg:width="25.196cm" svg:height="0.948cm" svg:x="1.466cm" svg:y="17.32cm" presentation:class="outline" presentation:user-transformed="true">
        <draw:text-box>
          <text:p text:style-name="MP8"><text:span text:style-name="MT2">Vortragende/r</text:span></text:p>
        </draw:text-box>
      </draw:frame>
      <draw:frame draw:name="Textplatzhalter 7" presentation:style-name="Mpr4" draw:text-style-name="MP6" draw:layer="backgroundobjects" svg:width="25.196cm" svg:height="2.754cm" svg:x="1.466cm" svg:y="12.032cm" presentation:class="outline" presentation:user-transformed="true">
        <draw:text-box>
          <text:p text:style-name="MP5"><text:span text:style-name="MT1">Titel der Präsentation</text:span></text:p>
        </draw:text-box>
      </draw:frame>
      <draw:frame draw:name="Textplatzhalter 7" presentation:style-name="Mpr4" draw:text-style-name="MP11" draw:layer="backgroundobjects" svg:width="25.196cm" svg:height="1.324cm" svg:x="1.466cm" svg:y="15.164cm" presentation:class="outline" presentation:user-transformed="true">
        <draw:text-box>
          <text:p text:style-name="MP10"><text:span text:style-name="MT3">Untertitel der Präsentation</text:span></text:p>
        </draw:text-box>
      </draw:frame>
      <draw:frame draw:name="Bild 6" draw:style-name="Mgr4" draw:text-style-name="MP7" draw:layer="backgroundobjects" svg:width="3.601cm" svg:height="3.045cm" svg:x="28.798cm" svg:y="11.741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presentation:notes style:page-layout-name="PM0">
        <draw:page-thumbnail presentation:style-name="Titelfolie_20_mit_20_Untertitel-title" draw:layer="backgroundobjects" svg:width="0cm" svg:height="0cm" svg:x="0cm" svg:y="2.257cm" presentation:class="page"/>
        <draw:frame presentation:style-name="Titelfolie_20_mit_20_Untertitel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20_mit_20_Störer" style:display-name="Titelfolie mit Störer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frame draw:name="Textplatzhalter 7" presentation:style-name="Mpr7" draw:text-style-name="MP6" draw:layer="backgroundobjects" svg:width="25.196cm" svg:height="4.455cm" svg:x="1.466cm" svg:y="12.032cm" presentation:class="outline" presentation:user-transformed="true">
        <draw:text-box>
          <text:p text:style-name="MP5"><text:span text:style-name="MT1">Titel der Präsentation</text:span></text:p>
        </draw:text-box>
      </draw:frame>
      <draw:frame draw:name="Grafik 7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10" draw:style-name="Mgr4" draw:text-style-name="MP7" draw:layer="backgroundobjects" svg:width="6.651cm" svg:height="2.58cm" svg:x="27.215cm" svg:y="15.596cm">
        <draw:image xlink:href="Pictures/10000001000007D0000003083AEBB544.png" xlink:type="simple" xlink:show="embed" xlink:actuate="onLoad" draw:mime-type="image/png">
          <text:p/>
        </draw:image>
      </draw:frame>
      <draw:frame draw:name="Textplatzhalter 7" presentation:style-name="Mpr7" draw:text-style-name="MP9" draw:layer="backgroundobjects" svg:width="25.196cm" svg:height="0.948cm" svg:x="1.466cm" svg:y="17.32cm" presentation:class="outline" presentation:user-transformed="true">
        <draw:text-box>
          <text:p text:style-name="MP8"><text:span text:style-name="MT2">Vortragende/r</text:span></text:p>
        </draw:text-box>
      </draw:frame>
      <draw:custom-shape draw:name="Textplatzhalter 8" draw:style-name="Mgr5" draw:text-style-name="MP13" draw:layer="backgroundobjects" svg:width="5.607cm" svg:height="5.623cm" draw:transform="rotate (-0.160919357033877) translate (21.128cm 6.155cm)">
        <text:p text:style-name="MP12"><text:span text:style-name="MT4">Optional ein Störer mit Text zu dem Thema.</text:span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Bild 6" draw:style-name="Mgr4" draw:text-style-name="MP7" draw:layer="backgroundobjects" svg:width="3.601cm" svg:height="3.045cm" svg:x="28.798cm" svg:y="11.741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presentation:notes style:page-layout-name="PM0">
        <draw:page-thumbnail presentation:style-name="Titelfolie_20_mit_20_Störer-title" draw:layer="backgroundobjects" svg:width="0cm" svg:height="0cm" svg:x="0cm" svg:y="2.257cm" presentation:class="page"/>
        <draw:frame presentation:style-name="Titelfolie_20_mit_20_Stör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20_mit_20_Untertitel_20_und_20_Störer" style:display-name="Titelfolie mit Untertitel und Störer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frame draw:name="Grafik 7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10" draw:style-name="Mgr4" draw:text-style-name="MP7" draw:layer="backgroundobjects" svg:width="6.651cm" svg:height="2.58cm" svg:x="27.215cm" svg:y="15.596cm">
        <draw:image xlink:href="Pictures/10000001000007D0000003083AEBB544.png" xlink:type="simple" xlink:show="embed" xlink:actuate="onLoad" draw:mime-type="image/png">
          <text:p/>
        </draw:image>
      </draw:frame>
      <draw:frame draw:name="Textplatzhalter 7" presentation:style-name="Mpr10" draw:text-style-name="MP9" draw:layer="backgroundobjects" svg:width="25.196cm" svg:height="0.948cm" svg:x="1.466cm" svg:y="17.32cm" presentation:class="outline" presentation:user-transformed="true">
        <draw:text-box>
          <text:p text:style-name="MP8"><text:span text:style-name="MT2">Vortragende/r</text:span></text:p>
        </draw:text-box>
      </draw:frame>
      <draw:custom-shape draw:name="Textplatzhalter 8" draw:style-name="Mgr6" draw:text-style-name="MP13" draw:layer="backgroundobjects" svg:width="5.607cm" svg:height="5.623cm" draw:transform="rotate (-0.160919357033877) translate (21.128cm 6.155cm)">
        <text:p text:style-name="MP12"><text:span text:style-name="MT4">Optional ein Störer mit Text zu dem Thema.</text:span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extplatzhalter 7" presentation:style-name="Mpr10" draw:text-style-name="MP6" draw:layer="backgroundobjects" svg:width="25.196cm" svg:height="2.754cm" svg:x="1.466cm" svg:y="12.032cm" presentation:class="outline" presentation:user-transformed="true">
        <draw:text-box>
          <text:p text:style-name="MP5"><text:span text:style-name="MT1">Titel der Präsentation</text:span></text:p>
        </draw:text-box>
      </draw:frame>
      <draw:frame draw:name="Textplatzhalter 7" presentation:style-name="Mpr10" draw:text-style-name="MP11" draw:layer="backgroundobjects" svg:width="25.196cm" svg:height="1.324cm" svg:x="1.466cm" svg:y="15.164cm" presentation:class="outline" presentation:user-transformed="true">
        <draw:text-box>
          <text:p text:style-name="MP10"><text:span text:style-name="MT3">Untertitel der Präsentation</text:span></text:p>
        </draw:text-box>
      </draw:frame>
      <draw:frame draw:name="Bild 6" draw:style-name="Mgr4" draw:text-style-name="MP7" draw:layer="backgroundobjects" svg:width="3.601cm" svg:height="3.045cm" svg:x="28.798cm" svg:y="11.741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presentation:notes style:page-layout-name="PM0">
        <draw:page-thumbnail presentation:style-name="Titelfolie_20_mit_20_Untertitel_20_und_20_Störer-title" draw:layer="backgroundobjects" svg:width="0cm" svg:height="0cm" svg:x="0cm" svg:y="2.257cm" presentation:class="page"/>
        <draw:frame presentation:style-name="Titelfolie_20_mit_20_Untertitel_20_und_20_Stör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Kapitaltrenner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frame draw:name="Textplatzhalter 7" presentation:style-name="Mpr13" draw:text-style-name="MP6" draw:layer="backgroundobjects" svg:width="25.196cm" svg:height="2.754cm" svg:x="1.466cm" svg:y="12.032cm" presentation:class="outline" presentation:user-transformed="true">
        <draw:text-box>
          <text:p text:style-name="MP5"><text:span text:style-name="MT1">Kapitelüberschrift</text:span></text:p>
        </draw:text-box>
      </draw:frame>
      <draw:frame draw:name="Grafik 3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7" draw:style-name="Mgr4" draw:text-style-name="MP7" draw:layer="backgroundobjects" svg:width="6.651cm" svg:height="2.58cm" svg:x="27.215cm" svg:y="0.928cm">
        <draw:image xlink:href="Pictures/10000001000007D0000003083AEBB544.png" xlink:type="simple" xlink:show="embed" xlink:actuate="onLoad" draw:mime-type="image/png">
          <text:p/>
        </draw:image>
      </draw:fram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7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Kapitaltrenner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apitaltrenner-title" draw:layer="backgroundobjects" svg:width="0cm" svg:height="0cm" svg:x="0cm" svg:y="2.257cm" presentation:class="page"/>
        <draw:frame presentation:style-name="Kapitaltrenn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Kapitaltrenner_20_mit_20_Unterkapitel" style:display-name="Kapitaltrenner mit Unterkapitel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frame draw:name="Grafik 3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7" draw:style-name="Mgr4" draw:text-style-name="MP7" draw:layer="backgroundobjects" svg:width="6.651cm" svg:height="2.58cm" svg:x="27.215cm" svg:y="0.928cm">
        <draw:image xlink:href="Pictures/10000001000007D0000003083AEBB544.png" xlink:type="simple" xlink:show="embed" xlink:actuate="onLoad" draw:mime-type="image/png">
          <text:p/>
        </draw:image>
      </draw:fram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8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6" draw:text-style-name="MP6" draw:layer="backgroundobjects" svg:width="25.196cm" svg:height="2.754cm" svg:x="1.466cm" svg:y="12.032cm" presentation:class="outline" presentation:user-transformed="true">
        <draw:text-box>
          <text:p text:style-name="MP5"><text:span text:style-name="MT1">Kapitelüberschrift</text:span></text:p>
        </draw:text-box>
      </draw:frame>
      <draw:frame draw:name="Textplatzhalter 7" presentation:style-name="Mpr16" draw:text-style-name="MP11" draw:layer="backgroundobjects" svg:width="25.196cm" svg:height="1.324cm" svg:x="1.466cm" svg:y="15.164cm" presentation:class="outline" presentation:user-transformed="true">
        <draw:text-box>
          <text:p text:style-name="MP10"><text:span text:style-name="MT3">Unterkapitelüberschrift</text:span></text:p>
        </draw:text-box>
      </draw:frame>
      <presentation:notes style:page-layout-name="PM0">
        <draw:page-thumbnail presentation:style-name="Kapitaltrenner_20_mit_20_Unterkapitel-title" draw:layer="backgroundobjects" svg:width="0cm" svg:height="0cm" svg:x="0cm" svg:y="2.257cm" presentation:class="page"/>
        <draw:frame presentation:style-name="Kapitaltrenner_20_mit_20_Unterkapitel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lussfolie" style:page-layout-name="PM1" draw:style-name="Mdp1">
      <loext:theme loext:name="DDI-UDE-Master: Titel- und Trennfolien">
        <loext:theme-colors loext:name="UNIVERSITÄT DUISBURG ESSEN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ec7206"/>
          <loext:color loext:name="accent2" loext:color="#61a27c"/>
          <loext:color loext:name="accent3" loext:color="#b8103b"/>
          <loext:color loext:name="accent4" loext:color="#feca00"/>
          <loext:color loext:name="accent5" loext:color="#a1b0d2"/>
          <loext:color loext:name="accent6" loext:color="#c1cadf"/>
          <loext:color loext:name="hyperlink" loext:color="#ffffff"/>
          <loext:color loext:name="followed-hyperlink" loext:color="#ffffff"/>
        </loext:theme-colors>
      </loext:theme>
      <draw:custom-shape draw:name="Textfeld 1" draw:style-name="Mgr9" draw:text-style-name="MP17" draw:layer="backgroundobjects" svg:width="25.112cm" svg:height="1.447cm" svg:x="1.466cm" svg:y="12.06cm">
        <text:p text:style-name="MP16"><text:span text:style-name="MT6">Vielen Dank für Ihre Aufmerksamkeit!</text:span></text:p>
        <text:p text:style-name="MP16"><text:span text:style-name="MT7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3" draw:text-style-name="MP7" draw:layer="backgroundobjects" svg:width="33.866cm" svg:height="9.499cm" svg:x="0cm" svg:y="0cm">
        <draw:image xlink:href="Pictures/1000000000000780000004383B257F67.jpg" xlink:type="simple" xlink:show="embed" xlink:actuate="onLoad" draw:mime-type="image/jpeg">
          <text:p/>
        </draw:image>
      </draw:frame>
      <draw:frame draw:name="Grafik 10" draw:style-name="Mgr4" draw:text-style-name="MP7" draw:layer="backgroundobjects" svg:width="6.651cm" svg:height="2.58cm" svg:x="27.215cm" svg:y="15.596cm">
        <draw:image xlink:href="Pictures/10000001000007D0000003083AEBB544.png" xlink:type="simple" xlink:show="embed" xlink:actuate="onLoad" draw:mime-type="image/png">
          <text:p/>
        </draw:image>
      </draw:frame>
      <draw:frame draw:name="Bild 6" draw:style-name="Mgr4" draw:text-style-name="MP7" draw:layer="backgroundobjects" svg:width="3.601cm" svg:height="3.045cm" svg:x="28.798cm" svg:y="11.741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Textfeld 3" draw:style-name="Mgr10" draw:text-style-name="MP19" draw:layer="backgroundobjects" svg:width="7.084cm" svg:height="3.806cm" svg:x="1.466cm" svg:y="14.346cm">
        <text:p text:style-name="MP18"><text:span text:style-name="MT8">Kontakt</text:span></text:p>
        <text:p text:style-name="MP18"><text:span text:style-name="MT9">Ihr Name</text:span><text:span text:style-name="MT10"><text:line-break/></text:span><text:span text:style-name="MT10">Universität Duisburg-Essen</text:span><text:span text:style-name="MT10"><text:line-break/></text:span><text:span text:style-name="MT10">Didaktik der Informatik</text:span><text:span text:style-name="MT10"><text:line-break/></text:span><text:span text:style-name="MT10">Schützenbahn 70, 45127 Essen</text:span><text:span text:style-name="MT10"><text:line-break/></text:span><text:span text:style-name="MT9">Ihre E-Mail-Adress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lussfolie-title" draw:layer="backgroundobjects" svg:width="30.479cm" svg:height="3.18cm" svg:x="1.693cm" svg:y="0.76cm" presentation:class="title" presentation:placeholder="true">
        <draw:text-box/>
      </draw:frame>
      <draw:frame presentation:style-name="Abschluss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Abschlussfolie-title" draw:layer="backgroundobjects" svg:width="0cm" svg:height="0cm" svg:x="0cm" svg:y="2.257cm" presentation:class="page"/>
        <draw:frame presentation:style-name="Ab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11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12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1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frame draw:name="Inhaltsplatzhalter 3" presentation:style-name="Mpr22" draw:text-style-name="MP29" draw:layer="backgroundobjects" svg:width="16.002cm" svg:height="14cm" svg:x="0.631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22" draw:text-style-name="MP29" draw:layer="backgroundobjects" svg:width="16.002cm" svg:height="14cm" svg:x="17.233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3" draw:text-style-name="MP31" draw:layer="backgroundobjects" svg:width="7.041cm" svg:height="1.101cm" svg:x="3.391cm" svg:y="17.524cm" presentation:class="outline" presentation:user-transformed="true">
        <draw:text-box>
          <text:p text:style-name="MP30"><text:span text:style-name="MT19">Literaturverweis</text:span><text:span text:style-name="MT19"><text:line-break/></text:span><text:span text:style-name="MT19">hier einfügen</text:span></text:p>
        </draw:text-box>
      </draw:frame>
      <presentation:notes style:page-layout-name="PM0">
        <draw:page-thumbnail presentation:style-name="Zwei_20_Inhalte-title" draw:layer="backgroundobjects" svg:width="0cm" svg:height="0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Ein_20_Inhalt" style:display-name="Ein Inhalt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14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15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6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frame draw:name="Inhaltsplatzhalter 3" presentation:style-name="Mpr27" draw:text-style-name="MP29" draw:layer="backgroundobjects" svg:width="32.604cm" svg:height="14cm" svg:x="0.631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8" draw:text-style-name="MP31" draw:layer="backgroundobjects" svg:width="7.041cm" svg:height="1.101cm" svg:x="3.391cm" svg:y="17.524cm" presentation:class="outline" presentation:user-transformed="true">
        <draw:text-box>
          <text:p text:style-name="MP30"><text:span text:style-name="MT19">Literaturverweis</text:span><text:span text:style-name="MT19"><text:line-break/></text:span><text:span text:style-name="MT19">hier einfügen</text:span></text:p>
        </draw:text-box>
      </draw:frame>
      <presentation:notes style:page-layout-name="PM0">
        <draw:page-thumbnail presentation:style-name="Ein_20_Inhalt-title" draw:layer="backgroundobjects" svg:width="0cm" svg:height="0cm" svg:x="0cm" svg:y="2.257cm" presentation:class="page"/>
        <draw:frame presentation:style-name="Ein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rei_20_Inhalte_20__28_Variante_20_1_29_" style:display-name="Drei Inhalte (Variante 1)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16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17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1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frame draw:name="Inhaltsplatzhalter 3" presentation:style-name="Mpr32" draw:text-style-name="MP29" draw:layer="backgroundobjects" svg:width="16.002cm" svg:height="14cm" svg:x="0.631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32" draw:text-style-name="MP29" draw:layer="backgroundobjects" svg:width="16.002cm" svg:height="6.697cm" svg:x="17.233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7" presentation:style-name="Mpr32" draw:text-style-name="MP29" draw:layer="backgroundobjects" svg:width="16.002cm" svg:height="6.702cm" svg:x="17.233cm" svg:y="10.724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3" draw:text-style-name="MP31" draw:layer="backgroundobjects" svg:width="7.041cm" svg:height="1.101cm" svg:x="3.391cm" svg:y="17.524cm" presentation:class="outline" presentation:user-transformed="true">
        <draw:text-box>
          <text:p text:style-name="MP30"><text:span text:style-name="MT19">Literaturverweis</text:span><text:span text:style-name="MT19"><text:line-break/></text:span><text:span text:style-name="MT19">hier einfügen</text:span></text:p>
        </draw:text-box>
      </draw:frame>
      <presentation:notes style:page-layout-name="PM0">
        <draw:page-thumbnail presentation:style-name="Drei_20_Inhalte_20__28_Variante_20_1_29_-title" draw:layer="backgroundobjects" svg:width="0cm" svg:height="0cm" svg:x="0cm" svg:y="2.257cm" presentation:class="page"/>
        <draw:frame presentation:style-name="Drei_20_Inhalte_20__28_Variante_20_1_29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rei_20_Inhalte_20__28_Variante_20_2_29_" style:display-name="Drei Inhalte (Variante 2)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18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19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6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frame draw:name="Inhaltsplatzhalter 3" presentation:style-name="Mpr37" draw:text-style-name="MP29" draw:layer="backgroundobjects" svg:width="16.002cm" svg:height="6.697cm" svg:x="0.631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37" draw:text-style-name="MP29" draw:layer="backgroundobjects" svg:width="16.002cm" svg:height="6.702cm" svg:x="0.631cm" svg:y="10.724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7" presentation:style-name="Mpr37" draw:text-style-name="MP29" draw:layer="backgroundobjects" svg:width="16.002cm" svg:height="14cm" svg:x="17.233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8" draw:text-style-name="MP31" draw:layer="backgroundobjects" svg:width="7.041cm" svg:height="1.101cm" svg:x="3.391cm" svg:y="17.524cm" presentation:class="outline" presentation:user-transformed="true">
        <draw:text-box>
          <text:p text:style-name="MP30"><text:span text:style-name="MT19">Literaturverweis</text:span><text:span text:style-name="MT19"><text:line-break/></text:span><text:span text:style-name="MT19">hier einfügen</text:span></text:p>
        </draw:text-box>
      </draw:frame>
      <presentation:notes style:page-layout-name="PM0">
        <draw:page-thumbnail presentation:style-name="Drei_20_Inhalte_20__28_Variante_20_2_29_-title" draw:layer="backgroundobjects" svg:width="0cm" svg:height="0cm" svg:x="0cm" svg:y="2.257cm" presentation:class="page"/>
        <draw:frame presentation:style-name="Drei_20_Inhalte_20__28_Variante_20_2_29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ier_20_Inhalte" style:display-name="Vier Inhalte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20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21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1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frame draw:name="Inhaltsplatzhalter 3" presentation:style-name="Mpr42" draw:text-style-name="MP29" draw:layer="backgroundobjects" svg:width="16.002cm" svg:height="6.699cm" svg:x="0.631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42" draw:text-style-name="MP29" draw:layer="backgroundobjects" svg:width="16.002cm" svg:height="6.699cm" svg:x="0.631cm" svg:y="10.73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7" presentation:style-name="Mpr42" draw:text-style-name="MP29" draw:layer="backgroundobjects" svg:width="16.002cm" svg:height="6.697cm" svg:x="17.233cm" svg:y="3.426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9" presentation:style-name="Mpr42" draw:text-style-name="MP29" draw:layer="backgroundobjects" svg:width="16.002cm" svg:height="6.697cm" svg:x="17.233cm" svg:y="10.729cm" presentation:class="outline" presentation:user-transformed="true">
        <draw:text-box>
          <text:list text:style-name="ML10">
            <text:list-item>
              <text:p text:style-name="MP24"><text:span text:style-name="MT14">Mastertextformat bearbeiten</text:span></text:p>
            </text:list-item>
          </text:list>
          <text:list text:style-name="ML11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6"><text:span text:style-name="MT16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43" draw:text-style-name="MP31" draw:layer="backgroundobjects" svg:width="7.041cm" svg:height="1.101cm" svg:x="3.391cm" svg:y="17.524cm" presentation:class="outline" presentation:user-transformed="true">
        <draw:text-box>
          <text:p text:style-name="MP30"><text:span text:style-name="MT19">Literaturverweis</text:span><text:span text:style-name="MT19"><text:line-break/></text:span><text:span text:style-name="MT19">hier einfügen</text:span></text:p>
        </draw:text-box>
      </draw:frame>
      <presentation:notes style:page-layout-name="PM0">
        <draw:page-thumbnail presentation:style-name="Vier_20_Inhalte-title" draw:layer="backgroundobjects" svg:width="0cm" svg:height="0cm" svg:x="0cm" svg:y="2.257cm" presentation:class="page"/>
        <draw:frame presentation:style-name="Vier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Nur_20_Titel_20_und_20_Fußzeile" style:display-name="Nur Titel und Fußzeile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22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23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frame draw:name="Textplatzhalter 4" presentation:style-name="Mpr47" draw:text-style-name="MP31" draw:layer="backgroundobjects" svg:width="7.041cm" svg:height="1.101cm" svg:x="3.391cm" svg:y="17.524cm" presentation:class="outline" presentation:user-transformed="true">
        <draw:text-box>
          <text:p text:style-name="MP32"><text:span text:style-name="MT19">Literaturverweis</text:span><text:span text:style-name="MT19"><text:line-break/></text:span><text:span text:style-name="MT19">hier einfügen</text:span></text:p>
        </draw:text-box>
      </draw:frame>
      <presentation:notes style:page-layout-name="PM0">
        <draw:page-thumbnail presentation:style-name="Nur_20_Titel_20_und_20_Fußzeile-title" draw:layer="backgroundobjects" svg:width="0cm" svg:height="0cm" svg:x="0cm" svg:y="2.257cm" presentation:class="page"/>
        <draw:frame presentation:style-name="Nur_20_Titel_20_und_20_Fußzeil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Leer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drawooo:display="none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24" draw:text-style-name="MP15" draw:layer="backgroundobjects" drawooo:display="none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drawooo:display="none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25" draw:text-style-name="MP15" draw:layer="backgroundobjects" drawooo:display="none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drawooo:display="none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" presentation:style-name="Mpr50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20">Mastertitelformat bearbeiten</text:span></text:p>
        </draw:text-box>
      </draw:frame>
      <presentation:notes style:page-layout-name="PM0">
        <draw:page-thumbnail presentation:style-name="Leer-title" draw:layer="backgroundobjects" svg:width="0cm" svg:height="0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Literaturverzeichnis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26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27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3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Überschrift Literaturverzeichnis</text:span></text:p>
        </draw:text-box>
      </draw:frame>
      <draw:frame draw:name="Textplatzhalter 3" presentation:style-name="Mpr54" draw:text-style-name="MP34" draw:layer="backgroundobjects" svg:width="32.604cm" svg:height="14cm" svg:x="0.631cm" svg:y="3.426cm" presentation:class="outline" presentation:user-transformed="true">
        <draw:text-box>
          <text:list text:style-name="ML17">
            <text:list-item>
              <text:p text:style-name="MP33"><text:span text:style-name="MT21">Mastertextformat bearbeiten</text:span></text:p>
            </text:list-item>
          </text:list>
        </draw:text-box>
      </draw:frame>
      <presentation:notes style:page-layout-name="PM0">
        <draw:page-thumbnail presentation:style-name="Literaturverzeichnis-title" draw:layer="backgroundobjects" svg:width="0cm" svg:height="0cm" svg:x="0cm" svg:y="2.257cm" presentation:class="page"/>
        <draw:frame presentation:style-name="Literaturverzeichnis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efinition_20_von_20_Standard-Formaten" style:display-name="Definition von Standard-Formaten" style:page-layout-name="PM1" draw:style-name="Mdp1">
      <loext:theme loext:name="DDI-UDE-Master: Inhaltsfolien">
        <loext:theme-colors loext:name="Benutzerdefiniert 1">
          <loext:color loext:name="dark1" loext:color="#000000"/>
          <loext:color loext:name="light1" loext:color="#ffffff"/>
          <loext:color loext:name="dark2" loext:color="#004c93"/>
          <loext:color loext:name="light2" loext:color="#efe4bf"/>
          <loext:color loext:name="accent1" loext:color="#dfe4f2"/>
          <loext:color loext:name="accent2" loext:color="#3b5988"/>
          <loext:color loext:name="accent3" loext:color="#4f75b1"/>
          <loext:color loext:name="accent4" loext:color="#758fc3"/>
          <loext:color loext:name="accent5" loext:color="#a1b0d2"/>
          <loext:color loext:name="accent6" loext:color="#c1cadf"/>
          <loext:color loext:name="hyperlink" loext:color="#004c93"/>
          <loext:color loext:name="followed-hyperlink" loext:color="#758fc3"/>
        </loext:theme-colors>
      </loext:theme>
      <draw:frame draw:name="Bild 11" draw:style-name="Mgr4" draw:text-style-name="MP7" draw:layer="backgroundobjects" svg:width="4.501cm" svg:height="1.721cm" svg:x="28.734cm" svg:y="0.936cm">
        <draw:image xlink:href="Pictures/10000001000006DA000002A6394CB748.png" xlink:type="simple" xlink:show="embed" xlink:actuate="onLoad" draw:mime-type="image/png">
          <text:p/>
        </draw:image>
        <svg:desc>Logo+Claim_RGB.png</svg:desc>
      </draw:frame>
      <draw:custom-shape draw:name="Rectangle 6" draw:style-name="Mgr28" draw:text-style-name="MP15" draw:layer="backgroundobjects" svg:width="4.138cm" svg:height="0.775cm" svg:x="29.727cm" svg:y="-0.079cm">
        <text:p text:style-name="MP14"><text:span text:style-name="MT1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4" draw:text-style-name="MP7" draw:layer="backgroundobjects" svg:width="2.989cm" svg:height="2.527cm" svg:x="0.341cm" svg:y="16.717cm">
        <draw:image xlink:href="Pictures/10000001000001BF0000017A73C08232.png" xlink:type="simple" xlink:show="embed" xlink:actuate="onLoad" draw:mime-type="image/png">
          <text:p/>
        </draw:image>
        <svg:desc>ddi_logo_cmyk_844_DDI_trans.png</svg:desc>
      </draw:frame>
      <draw:custom-shape draw:name="Rectangle 5" draw:style-name="Mgr29" draw:text-style-name="MP15" draw:layer="backgroundobjects" svg:width="22.271cm" svg:height="1.101cm" svg:x="11.232cm" svg:y="17.524cm">
        <text:p text:style-name="MP14"><text:span text:style-name="MT5">Ihre E-Mail-Adresse</text:span></text:p>
        <text:p text:style-name="MP14"><text:span text:style-name="MT5">Titel der Prä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" draw:style-name="Mgr13" draw:text-style-name="MP21" draw:layer="backgroundobjects" svg:width="0.001cm" svg:height="0.001cm" svg:x="17.272cm" svg:y="1.942cm">
        <text:p text:style-name="MP20"><text:span text:style-name="MT1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7" draw:text-style-name="MP23" draw:layer="backgroundobjects" svg:width="27.671cm" svg:height="2.323cm" svg:x="0.631cm" svg:y="0.498cm" presentation:class="title" presentation:user-transformed="true">
        <draw:text-box>
          <text:p text:style-name="MP22"><text:span text:style-name="MT13">Mastertitelformat bearbeiten</text:span></text:p>
        </draw:text-box>
      </draw:frame>
      <draw:connector draw:name="Gerade Verbindung 9" draw:style-name="Mgr30" draw:text-style-name="MP7" draw:layer="backgroundobjects" draw:type="line" svg:x1="6.657cm" svg:y1="9.525cm" svg:x2="14.261cm" svg:y2="6.058cm" svg:d="M6657 9525l7604-3467" svg:viewBox="0 0 7605 3468">
        <text:p/>
      </draw:connector>
      <draw:custom-shape draw:name="Textfeld 4" draw:style-name="Mgr31" draw:text-style-name="MP35" draw:layer="backgroundobjects" svg:width="6.325cm" svg:height="0.926cm" svg:x="21.976cm" svg:y="5.588cm">
        <text:list text:style-name="ML18">
          <text:list-item>
            <text:p text:style-name="MP20"><text:span text:style-name="MT12">Test</text:span></text:p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inition_20_von_20_Standard-Formaten-title" draw:layer="backgroundobjects" svg:width="0cm" svg:height="0cm" svg:x="0cm" svg:y="2.257cm" presentation:class="page"/>
        <draw:frame presentation:style-name="Definition_20_von_20_Standard-Formate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keyword>Didaktik</meta:keyword>
    <meta:keyword>der</meta:keyword>
    <meta:keyword>Informatik</meta:keyword>
    <meta:keyword>DDI</meta:keyword>
    <meta:keyword>Informatikunterricht</meta:keyword>
    <meta:keyword>Informatische</meta:keyword>
    <meta:keyword>Bildung</meta:keyword>
    <meta:keyword>Unterrichtsmethoden</meta:keyword>
    <meta:editing-cycles>3</meta:editing-cycles>
    <meta:print-date>2015-09-29T12:31:20</meta:print-date>
    <meta:creation-date>2026-07-14T15:59:56.551512439</meta:creation-date>
    <dc:date>2026-07-14T16:05:14.426576835</dc:date>
    <meta:editing-duration>PT5M19S</meta:editing-duration>
    <meta:generator>LibreOffice/24.2.7.2$Linux_X86_64 LibreOffice_project/420$Build-2</meta:generator>
    <meta:document-statistic meta:object-count="284"/>
    <meta:user-defined meta:name="AppVersion">16.0000</meta:user-defined>
    <meta:user-defined meta:name="HyperlinkBase">http://udue.de/tb/</meta:user-defined>
    <meta:user-defined meta:name="PresentationFormat">Breitbild</meta:user-defined>
    <meta:user-defined meta:name="Slides" meta:value-type="float">10</meta:user-defined>
  </office:meta>
</office:document-meta>
</file>